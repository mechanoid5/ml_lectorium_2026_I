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800000193DF5C17E0.png" manifest:media-type="image/png"/>
  <manifest:file-entry manifest:full-path="Pictures/100000010000076C000003419DCDCC7E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Обычный_5f_2_5f_2_5f_1">
      <style:graphic-properties draw:stroke="none" draw:fill="none" fo:min-height="13.267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textarea-horizontal-align="center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6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Mixture Density Networks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 text:style-name="P3">MDN</text:p>
          </draw:text-box>
        </draw:frame>
        <draw:frame draw:style-name="gr2" draw:text-style-name="P1" draw:layer="layout" svg:width="23.919cm" svg:height="10.485cm" svg:x="1.8cm" svg:y="6.4cm">
          <draw:image xlink:href="Pictures/100000010000076C000003419DCDCC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 text:style-name="P3">MDN</text:p>
          </draw:text-box>
        </draw:frame>
        <draw:frame draw:style-name="gr2" draw:text-style-name="P1" draw:layer="layout" svg:width="10.494cm" svg:height="11.248cm" svg:x="8.834cm" svg:y="4.912cm">
          <draw:image xlink:href="Pictures/100000010000017800000193DF5C17E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4" draw:master-page-name="Inspiration" presentation:presentation-page-layout-name="AL1T0">
        <office:forms form:automatic-focus="false" form:apply-design-mode="false"/>
        <draw:frame draw:style-name="gr3" draw:text-style-name="P6" draw:layer="layout" svg:width="26.4cm" svg:height="13.517cm" svg:x="1cm" svg:y="3.8cm">
          <draw:text-box>
            <text:p><text:span text:style-name="T4">git clone </text:span><text:span text:style-name="T5"><text:a xlink:href="https://github.com/mechanoid5/ml_lectorium.git" xlink:type="simple">https://github.com/mechanoid5/ml_lectorium.git</text:a></text:span></text:p>
            <text:p><text:span text:style-name="T5"/></text:p>
            <text:p><text:span text:style-name="T5"/></text:p>
            <text:p text:style-name="P4"><text:span text:style-name="T6">Mixture Density Networks <text:s/></text:span><text:span text:style-name="T6"><text:a xlink:href="https://habr.com/ru/post/433804/" xlink:type="simple">https://habr.com/ru/post/433804/</text:a></text:span></text:p>
            <text:p text:style-name="P4"><text:span text:style-name="T6"/></text:p>
            <text:p><text:span text:style-name="T5"/></text:p>
            <text:p><text:span text:style-name="T5"/></text:p>
            <text:p><text:span text:style-name="T7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3" draw:layer="layout" svg:width="24.6cm" svg:height="2cm" svg:x="0.6cm" svg:y="1.6cm" presentation:class="title" presentation:user-transformed="true">
          <draw:text-box>
            <text:p text:style-name="P3"><text:span text:style-name="T8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6-13T22:02:17.557424308</dc:date>
    <meta:editing-duration>P2DT4H49M27S</meta:editing-duration>
    <meta:editing-cycles>652</meta:editing-cycles>
    <meta:generator>LibreOffice/26.2.2.2$Linux_X86_64 LibreOffice_project/620$Build-2</meta:generator>
    <meta:document-statistic meta:object-count="48"/>
  </office:meta>
</office:document-meta>
</file>