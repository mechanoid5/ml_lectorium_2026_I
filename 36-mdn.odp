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13.267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textarea-horizontal-align="center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Mixture Density Networks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 text:style-name="P3">MDN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2" draw:text-style-name="P6" draw:layer="layout" svg:width="26.4cm" svg:height="13.517cm" svg:x="1cm" svg:y="3.8cm">
          <draw:text-box>
            <text:p><text:span text:style-name="T4">git clone </text:span><text:span text:style-name="T5"><text:a xlink:href="https://github.com/mechanoid5/ml_lectorium.git" xlink:type="simple">https://github.com/mechanoid5/ml_lectorium.git</text:a></text:span></text:p>
            <text:p><text:span text:style-name="T5"/></text:p>
            <text:p><text:span text:style-name="T5"/></text:p>
            <text:p text:style-name="P4"><text:span text:style-name="T5">Mixture Density Networks </text:span></text:p>
            <text:p text:style-name="P4"><text:span text:style-name="T5">https://habr.com/ru/post/433804/</text:span></text:p>
            <text:p><text:span text:style-name="T5"/></text:p>
            <text:p><text:span text:style-name="T5"/></text:p>
            <text:p><text:span text:style-name="T6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3" draw:layer="layout" svg:width="24.6cm" svg:height="2cm" svg:x="0.6cm" svg:y="1.6cm" presentation:class="title" presentation:user-transformed="true">
          <draw:text-box>
            <text:p text:style-name="P3"><text:span text:style-name="T7">RBF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6-13T21:49:25.404004555</dc:date>
    <meta:editing-duration>P2DT4H46M1S</meta:editing-duration>
    <meta:editing-cycles>650</meta:editing-cycles>
    <meta:generator>LibreOffice/26.2.2.2$Linux_X86_64 LibreOffice_project/620$Build-2</meta:generator>
    <meta:document-statistic meta:object-count="43"/>
  </office:meta>
</office:document-meta>
</file>