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C000001540538ED1C.png" manifest:media-type="image/png"/>
  <manifest:file-entry manifest:full-path="Pictures/1000000000000140000000F0597D7B3F.png" manifest:media-type="image/png"/>
  <manifest:file-entry manifest:full-path="Pictures/100000010000014200000034C4752E5C.png" manifest:media-type="image/png"/>
  <manifest:file-entry manifest:full-path="Pictures/100000010000006C000000345E6113BE.png" manifest:media-type="image/png"/>
  <manifest:file-entry manifest:full-path="Pictures/1000000000000140000000F0B1999448.png" manifest:media-type="image/png"/>
  <manifest:file-entry manifest:full-path="Pictures/10000000000004E2000003A4CF13BFBA.png" manifest:media-type="image/png"/>
  <manifest:file-entry manifest:full-path="Pictures/10000000000001600000012008318F47.png" manifest:media-type="image/png"/>
  <manifest:file-entry manifest:full-path="Pictures/1000000000000140000000F0C5338FC9.png" manifest:media-type="image/png"/>
  <manifest:file-entry manifest:full-path="Pictures/10000000000002E40000019F98433EB6.png" manifest:media-type="image/png"/>
  <manifest:file-entry manifest:full-path="Pictures/100000000000016000000120169DC64D.png" manifest:media-type="image/png"/>
  <manifest:file-entry manifest:full-path="Pictures/10000000000002E40000019F35B3F3EE.png" manifest:media-type="image/png"/>
  <manifest:file-entry manifest:full-path="Pictures/1000000000000180000002001129DED7.png" manifest:media-type="image/png"/>
  <manifest:file-entry manifest:full-path="Pictures/10000001000000990000003A83A8C81E.png" manifest:media-type="image/png"/>
  <manifest:file-entry manifest:full-path="Pictures/10000001000001250000002F110DA50A.png" manifest:media-type="image/png"/>
  <manifest:file-entry manifest:full-path="Pictures/10000000000001F40000015E135B551E.png" manifest:media-type="image/png"/>
  <manifest:file-entry manifest:full-path="Pictures/10000001000001B000000145D65D6E5B.png" manifest:media-type="image/png"/>
  <manifest:file-entry manifest:full-path="Pictures/1000000000000160000001209A51EF18.png" manifest:media-type="image/png"/>
  <manifest:file-entry manifest:full-path="Pictures/10000000000001F4000001781790D220.png" manifest:media-type="image/png"/>
  <manifest:file-entry manifest:full-path="Pictures/1000000000000CEC000009B1F1F5393E.png" manifest:media-type="image/png"/>
  <manifest:file-entry manifest:full-path="Pictures/100000010000014C00000035D7F7900D.png" manifest:media-type="image/png"/>
  <manifest:file-entry manifest:full-path="Pictures/100000010000011E000001356BA6FEDA.png" manifest:media-type="image/png"/>
  <manifest:file-entry manifest:full-path="Pictures/10000000000002E40000019F4E53ACA3.png" manifest:media-type="image/png"/>
  <manifest:file-entry manifest:full-path="Pictures/100000000000013D000000A170D0E097.png" manifest:media-type="image/png"/>
  <manifest:file-entry manifest:full-path="Pictures/10000000000002E40000019FA3BDB4D7.png" manifest:media-type="image/png"/>
  <manifest:file-entry manifest:full-path="Pictures/100000010000010700000154C1839FEF.png" manifest:media-type="image/png"/>
  <manifest:file-entry manifest:full-path="Pictures/100000000000013D000000A15A36AF8E.png" manifest:media-type="image/png"/>
  <manifest:file-entry manifest:full-path="Pictures/1000000000000073000000CED7DF32B9.png" manifest:media-type="image/png"/>
  <manifest:file-entry manifest:full-path="Pictures/10000000000001800000020058C87A1D.png" manifest:media-type="image/png"/>
  <manifest:file-entry manifest:full-path="Pictures/10000001000002BA000000DD38B55F23.png" manifest:media-type="image/png"/>
  <manifest:file-entry manifest:full-path="Pictures/10000000000002B3000003338B18D79F.png" manifest:media-type="image/png"/>
  <manifest:file-entry manifest:full-path="Pictures/100000010000014E000001360A8B849D.png" manifest:media-type="image/png"/>
  <manifest:file-entry manifest:full-path="Pictures/10000000000001560000012001825AB1.png" manifest:media-type="image/png"/>
  <manifest:file-entry manifest:full-path="Pictures/100000000000014E000000678A1166B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2.35cm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draw:fill="none" fo:min-height="5.1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98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3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5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6.399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ffd7" fo:min-height="10.817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dbb6" fo:min-height="6.39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4.45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3.301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3.9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87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184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5.262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5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07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0.31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1.30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5.527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5.9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39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4.673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6.634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30" style:family="graphic" style:parent-style-name="standard" style:list-style-name="L2">
      <style:graphic-properties draw:fill-color="#ffbf00" draw:textarea-horizontal-align="justify" draw:textarea-vertical-align="middle" draw:auto-grow-height="false" fo:min-height="1.55cm" fo:min-width="8.7cm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1.55cm" fo:min-width="7.5cm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75cm" fo:min-width="6.3cm" style:writing-mode="lr-tb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solid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1.35cm" fo:min-width="6.7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fill-color="#ffe994" draw:textarea-horizontal-align="justify" draw:textarea-vertical-align="middle" draw:auto-grow-height="false" fo:min-height="1.95cm" fo:min-width="7.5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fill-color="#ffff00" draw:textarea-horizontal-align="justify" draw:textarea-vertical-align="middle" draw:auto-grow-height="false" fo:min-height="0.95cm" fo:min-width="3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fill-color="#81d41a" draw:textarea-horizontal-align="justify" draw:textarea-vertical-align="middle" draw:auto-grow-height="false" fo:min-height="2.15cm" fo:min-width="6.1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45" style:family="graphic" style:parent-style-name="standard">
      <style:graphic-properties draw:stroke="none" draw:fill="none" fo:min-height="4.689cm" loext:decorative="false"/>
      <style:paragraph-properties style:writing-mode="lr-tb"/>
    </style:style>
    <style:style style:name="gr46" style:family="graphic" style:parent-style-name="Обычный_5f_2_5f_2_5f_1">
      <style:graphic-properties draw:stroke="none" draw:fill="none" fo:min-height="15.8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889cm" loext:decorative="false"/>
      <style:paragraph-properties style:writing-mode="lr-tb"/>
    </style:style>
    <style:style style:name="pr5" style:family="presentation" style:parent-style-name="Inspiration-title">
      <style:graphic-properties fo:min-height="0.94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solid" draw:fill-color="#ffffd7"/>
      <style:text-properties fo:font-size="18pt"/>
    </style:style>
    <style:style style:name="P12" style:family="paragraph">
      <loext:graphic-properties draw:fill="solid" draw:fill-color="#ffdbb6"/>
      <style:text-properties fo:font-size="18pt"/>
    </style:style>
    <style:style style:name="P13" style:family="paragraph">
      <style:paragraph-properties fo:margin-left="0cm" fo:margin-right="0cm" fo:margin-top="0.42cm" fo:margin-bottom="0.35cm" fo:line-height="100%" fo:text-indent="0cm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1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solid" draw:fill-color="#ffffd7"/>
      <style:paragraph-properties fo:text-align="center"/>
    </style:style>
    <style:style style:name="P24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8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24pt" style:font-size-complex="24pt"/>
    </style:style>
    <style:style style:name="T21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7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28" style:family="text">
      <style:text-properties fo:font-size="18pt" style:text-underline-style="solid" style:text-underline-width="auto" style:text-underline-color="font-color"/>
    </style:style>
    <style:style style:name="T29" style:family="text">
      <style:text-properties fo:font-size="18pt" style:text-underline-style="none"/>
    </style:style>
    <style:style style:name="T30" style:family="text">
      <style:text-properties fo:font-size="15pt" style:text-underline-style="none" style:font-size-asian="15pt" style:font-size-complex="15pt"/>
    </style:style>
    <style:style style:name="T31" style:family="text">
      <style:text-properties fo:font-size="14pt" style:text-underline-style="none" style:font-size-asian="14pt" style:font-size-complex="14pt"/>
    </style:style>
    <style:style style:name="T3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color="#000000" loext:opacity="100%" fo:font-size="14pt" style:font-size-asian="14pt" style:font-size-complex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39" style:family="text">
      <style:text-properties style:font-name="Droid Sans Mono" fo:font-size="14pt" style:font-size-asian="14pt" style:font-size-complex="14pt"/>
    </style:style>
    <style:style style:name="T40" style:family="text">
      <style:text-properties style:font-name="Droid Sans Mono" fo:font-size="14pt" fo:language="ru" fo:country="RU" style:font-size-asian="14pt" style:font-size-complex="14pt"/>
    </style:style>
    <style:style style:name="T4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О задаче поиска объектов на изображении</text:span></text:p>
            <text:p><text:span text:style-name="T2"/></text:p>
            <text:p><text:span text:style-name="T3">Евгений Борисов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ML обработка изображений</text:span></text:p>
          </draw:text-box>
        </draw:frame>
        <draw:frame draw:style-name="gr2" draw:text-style-name="P4" draw:layer="layout" svg:width="26.253cm" svg:height="12.6cm" svg:x="0.947cm" svg:y="5cm">
          <draw:text-box>
            <text:p><text:span text:style-name="T6">цели обработки изображений</text:span></text:p>
            <text:p><text:span text:style-name="T7"/></text:p>
            <text:p><text:span text:style-name="T8"/></text:p>
            <text:p><text:span text:style-name="T8">Полиграфия, дизайн</text:span><text:span text:style-name="T7"> — улучшение качества, ретушь, изменение размера и формы, композиция.</text:span></text:p>
            <text:p><text:span text:style-name="T7"/></text:p>
            <text:p text:style-name="P3"><text:span text:style-name="T8"/></text:p>
            <text:p text:style-name="P3"><text:span text:style-name="T8">Спецэффекты в кино</text:span><text:span text:style-name="T7"> – композиция, монтаж фонов, захват движения.</text:span></text:p>
            <text:p><text:span text:style-name="T7"/></text:p>
            <text:p><text:span text:style-name="T8"/></text:p>
            <text:p><text:span text:style-name="T8">Интернет</text:span><text:span text:style-name="T7"> — поиск, аннотация, поиск дубликатов, распознавание объектов.</text:span></text:p>
            <text:p><text:span text:style-name="T7"/></text:p>
            <text:p><text:span text:style-name="T8"/></text:p>
            <text:p><text:span text:style-name="T8">Промышленные системы</text:span><text:span text:style-name="T7"> — диагностика, контроль качества.</text:span></text:p>
            <text:p><text:span text:style-name="T7"/></text:p>
            <text:p text:style-name="P3"><text:span text:style-name="T8">Роботы и видеонаблюдение</text:span><text:span text:style-name="T7"> — поиск и локализация объектов, отслеживание, распознавание объектов, распознавание жестов и событий.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ML обработка изображений</text:span></text:p>
          </draw:text-box>
        </draw:frame>
        <draw:frame draw:style-name="gr3" draw:text-style-name="P6" draw:layer="layout" svg:width="10.6cm" svg:height="5.41cm" svg:x="13.8cm" svg:y="8.4cm">
          <draw:text-box>
            <text:p text:style-name="P3">классификатор изображений</text:p>
            <text:p text:style-name="P3"/>
            <text:p text:style-name="P3">сегментация изображения</text:p>
            <text:p/>
            <text:p>локализация объектов</text:p>
            <text:p/>
            <text:p>сопровождение объектов</text:p>
          </draw:text-box>
        </draw:frame>
        <draw:frame draw:style-name="gr4" draw:text-style-name="P7" draw:layer="layout" svg:width="10.4cm" svg:height="5.41cm" svg:x="2.2cm" svg:y="8.5cm">
          <draw:text-box>
            <text:p text:style-name="P3">сравнение изображений</text:p>
            <text:p text:style-name="P3"/>
            <text:p>коррекция изображения</text:p>
            <text:p/>
            <text:p text:style-name="P3">стилизация изображений</text:p>
            <text:p text:style-name="P3"/>
            <text:p text:style-name="P3">генератор изображений</text:p>
          </draw:text-box>
        </draw:frame>
        <draw:frame draw:style-name="gr5" draw:text-style-name="P7" draw:layer="layout" svg:width="16.39cm" svg:height="1.238cm" svg:x="3.81cm" svg:y="6.4cm">
          <draw:text-box>
            <text:p><text:span text:style-name="T1">задачи обработки изображений</text:span></text:p>
          </draw:text-box>
        </draw:frame>
        <draw:frame draw:style-name="gr6" draw:text-style-name="P7" draw:layer="layout" svg:width="8.706cm" svg:height="2.6cm" svg:x="10.094cm" svg:y="15.6cm">
          <draw:text-box>
            <text:p>реконструкция сцены</text:p>
            <text:p/>
            <text:p>распознавание событ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8" draw:layer="layout" svg:width="23.399cm" svg:height="1.889cm" svg:x="0.801cm" svg:y="1.574cm" presentation:class="title" presentation:user-transformed="true">
          <draw:text-box>
            <text:p><text:span text:style-name="T1">Задача поиска объектов на изображении</text:span></text:p>
          </draw:text-box>
        </draw:frame>
        <draw:frame draw:style-name="gr7" draw:text-style-name="P7" draw:layer="layout" svg:width="24.6cm" svg:height="4.8cm" svg:x="1cm" svg:y="3.8cm">
          <draw:text-box>
            <text:p><text:span text:style-name="T9">Classification</text:span><text:span text:style-name="T10"> — классификация изображения по типу объекта, </text:span></text:p>
            <text:p><text:span text:style-name="T10">которое оно содержит;</text:span></text:p>
            <text:p><text:span text:style-name="T10"/></text:p>
            <text:p><text:span text:style-name="T9">Semantic segmentation</text:span><text:span text:style-name="T10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8" draw:text-style-name="P9" draw:layer="layout" svg:width="13.228cm" svg:height="9.947cm" svg:x="13.772cm" svg:y="8.453cm">
          <draw:image xlink:href="Pictures/10000000000001F4000001781790D220.png" xlink:type="simple" xlink:show="embed" xlink:actuate="onLoad" draw:mime-type="image/png">
            <text:p/>
          </draw:image>
        </draw:frame>
        <draw:frame draw:style-name="gr9" draw:text-style-name="P7" draw:layer="layout" svg:width="13.199cm" svg:height="6.649cm" svg:x="1cm" svg:y="8.4cm">
          <draw:text-box>
            <text:p><text:span text:style-name="T9">Object detection</text:span><text:span text:style-name="T10"> — обнаружение всех объектов указанных классов и определение охватывающей рамки для каждого из них;</text:span></text:p>
            <text:p><text:span text:style-name="T10"/></text:p>
            <text:p><text:span text:style-name="T10"/></text:p>
            <text:p><text:span text:style-name="T9">Instance segmentation</text:span><text:span text:style-name="T10"> — определение пикселей, принадлежащих каждому объекту каждого класса по отдельности;</text:span></text:p>
          </draw:text-box>
        </draw:frame>
        <draw:frame draw:style-name="gr10" draw:text-style-name="P10" draw:layer="layout" svg:width="11.051cm" svg:height="0.997cm" svg:x="1.349cm" svg:y="18.811cm">
          <draw:text-box>
            <text:p><text:span text:style-name="T11"><text:a xlink:href="https://habr.com/ru/post/421299/" xlink:type="simple">https://habr.com/ru/post/421299/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1" draw:text-style-name="P11" draw:layer="layout" svg:width="13.2cm" svg:height="11.067cm" svg:x="1.2cm" svg:y="5.333cm">
          <draw:text-box>
            <text:p><text:span text:style-name="T1">Модель объекта</text:span></text:p>
            <text:p text:style-name="P3"><text:span text:style-name="T8">- необходимо понимать что хотим найти</text:span></text:p>
            <text:p><text:span text:style-name="T1"/></text:p>
            <text:p><text:span text:style-name="T12">Цветовые фильтры </text:span></text:p>
            <text:p><text:span text:style-name="T12"/></text:p>
            <text:p><text:span text:style-name="T12">Выделение и анализ контуров</text:span></text:p>
            <text:p><text:span text:style-name="T12"/></text:p>
            <text:p><text:span text:style-name="T12">Сопоставление с шаблоном </text:span></text:p>
            <text:p><text:span text:style-name="T12"/></text:p>
            <text:p><text:span text:style-name="T12">Работа с особыми точками </text:span></text:p>
            <text:p><text:span text:style-name="T12"/></text:p>
            <text:p><text:span text:style-name="T12">Методы машинного обучения </text:span></text:p>
            <text:p><text:span text:style-name="T12"/></text:p>
          </draw:text-box>
        </draw:frame>
        <draw:frame draw:style-name="gr12" draw:text-style-name="P12" draw:layer="layout" svg:width="12cm" svg:height="6.645cm" svg:x="14.8cm" svg:y="5.4cm">
          <draw:text-box>
            <text:p><text:span text:style-name="T1">Модель фона</text:span></text:p>
            <text:p text:style-name="P3"><text:span text:style-name="T13">- камера неподвижна</text:span></text:p>
            <text:p><text:span text:style-name="T1"/></text:p>
            <text:p><text:span text:style-name="T12">Усреднённый фон</text:span></text:p>
            <text:p><text:span text:style-name="T12"/></text:p>
            <text:p><text:span text:style-name="T12">Модель фона по Гауссу</text:span></text:p>
            <text:p><text:span text:style-name="T12"/></text:p>
            <text:p><text:span text:style-name="T12">Смесь гауссиан как модель фона</text:span></text:p>
          </draw:text-box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draw:frame draw:style-name="gr12" draw:text-style-name="P12" draw:layer="layout" svg:width="12cm" svg:height="6.645cm" svg:x="7cm" svg:y="7cm">
          <draw:text-box>
            <text:p><text:span text:style-name="T1">Модель фона</text:span></text:p>
            <text:p text:style-name="P3"><text:span text:style-name="T13">- камера неподвижна</text:span></text:p>
            <text:p><text:span text:style-name="T1"/></text:p>
            <text:p><text:span text:style-name="T12">Усреднённый фон</text:span></text:p>
            <text:p><text:span text:style-name="T12"/></text:p>
            <text:p><text:span text:style-name="T12">Модель фона по Гауссу</text:span></text:p>
            <text:p><text:span text:style-name="T12"/></text:p>
            <text:p><text:span text:style-name="T12">Смесь гауссиан как модель ф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14" draw:layer="layout" svg:width="17.2cm" svg:height="4.708cm" svg:x="1.6cm" svg:y="4.2cm">
          <draw:text-box>
            <text:p><text:span text:style-name="T1">Модель фона / </text:span><text:span text:style-name="T3">Усреднённый фон</text:span></text:p>
            <text:p text:style-name="P13"><text:span text:style-name="T14">Соберём историю из n кадров, </text:span></text:p>
            <text:p text:style-name="P13"><text:span text:style-name="T14">вычислим среднее значение </text:span></text:p>
            <text:p text:style-name="P13"><text:span text:style-name="T14">и будем использовать этот результат как фон</text:span></text:p>
          </draw:text-box>
        </draw:frame>
        <draw:frame draw:style-name="gr14" draw:text-style-name="P16" draw:layer="layout" svg:width="17.736cm" svg:height="1.725cm" svg:x="1.464cm" svg:y="18cm">
          <draw:text-box>
            <text:p text:style-name="P15"><text:span text:style-name="T14">работает удовлетворительно только в условиях стабильного освещения и отсутствия шума</text:span></text:p>
          </draw:text-box>
        </draw:frame>
        <draw:frame draw:style-name="gr8" draw:text-style-name="P9" draw:layer="layout" svg:width="9.312cm" svg:height="7.619cm" svg:x="13cm" svg:y="9.4cm">
          <draw:image xlink:href="Pictures/10000000000001600000012008318F47.png" xlink:type="simple" xlink:show="embed" xlink:actuate="onLoad" draw:mime-type="image/png">
            <text:p/>
          </draw:image>
        </draw:frame>
        <draw:frame draw:style-name="gr8" draw:text-style-name="P9" draw:layer="layout" svg:width="5.257cm" svg:height="2.53cm" svg:x="20.143cm" svg:y="6.2cm">
          <draw:image xlink:href="Pictures/100000010000006C000000345E6113BE.png" xlink:type="simple" xlink:show="embed" xlink:actuate="onLoad" draw:mime-type="image/png">
            <text:p/>
          </draw:image>
        </draw:frame>
        <draw:frame draw:style-name="gr8" draw:text-style-name="P9" draw:layer="layout" svg:width="9.312cm" svg:height="7.619cm" svg:x="1.6cm" svg:y="9.6cm">
          <draw:image xlink:href="Pictures/100000000000016000000120169DC64D.png" xlink:type="simple" xlink:show="embed" xlink:actuate="onLoad" draw:mime-type="image/png">
            <text:p/>
          </draw:image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17" draw:layer="layout" svg:width="25.8cm" svg:height="3.551cm" svg:x="1cm" svg:y="4.4cm">
          <draw:text-box>
            <text:p text:style-name="P3"><text:span text:style-name="T15">Модель фона /</text:span><text:span text:style-name="T16"> </text:span><text:span text:style-name="T17">Модель фона по Гауссу</text:span></text:p>
            <text:p text:style-name="P13"><text:span text:style-name="T14">состояние точек фона находится в окрестности определённого значения</text:span></text:p>
            <text:p text:style-name="P13"><text:span text:style-name="T14">фон задаётся нормальными распределениями яркостей точек </text:span></text:p>
          </draw:text-box>
        </draw:frame>
        <draw:frame draw:style-name="gr8" draw:text-style-name="P9" draw:layer="layout" svg:width="7.805cm" svg:height="5.463cm" svg:x="1cm" svg:y="8.537cm">
          <draw:image xlink:href="Pictures/10000000000001F40000015E135B551E.png" xlink:type="simple" xlink:show="embed" xlink:actuate="onLoad" draw:mime-type="image/png">
            <text:p/>
          </draw:image>
        </draw:frame>
        <draw:frame draw:style-name="gr8" draw:text-style-name="P9" draw:layer="layout" svg:width="7.751cm" svg:height="1.243cm" svg:x="10cm" svg:y="10.957cm">
          <draw:image xlink:href="Pictures/10000001000001250000002F110DA50A.png" xlink:type="simple" xlink:show="embed" xlink:actuate="onLoad" draw:mime-type="image/png">
            <text:p/>
          </draw:image>
        </draw:frame>
        <draw:frame draw:style-name="gr8" draw:text-style-name="P9" draw:layer="layout" svg:width="8.519cm" svg:height="1.375cm" svg:x="9.8cm" svg:y="8.8cm">
          <draw:image xlink:href="Pictures/100000010000014200000034C4752E5C.png" xlink:type="simple" xlink:show="embed" xlink:actuate="onLoad" draw:mime-type="image/png">
            <text:p/>
          </draw:image>
        </draw:frame>
        <draw:frame draw:style-name="gr8" draw:text-style-name="P9" draw:layer="layout" svg:width="8.466cm" svg:height="6.349cm" svg:x="10.934cm" svg:y="13.2cm">
          <draw:image xlink:href="Pictures/1000000000000140000000F0C5338FC9.png" xlink:type="simple" xlink:show="embed" xlink:actuate="onLoad" draw:mime-type="image/png">
            <text:p/>
          </draw:image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17" draw:layer="layout" svg:width="25.8cm" svg:height="4.2cm" svg:x="1cm" svg:y="4.4cm">
          <draw:text-box>
            <text:p text:style-name="P3"><text:span text:style-name="T15">Модель фона /</text:span><text:span text:style-name="T16"> Смесь гауссиан</text:span><text:span text:style-name="T18"> </text:span></text:p>
            <text:p text:style-name="P13"><text:span text:style-name="T14">фон задаётся смесью нормальных распределений яркостей точек </text:span></text:p>
            <text:p text:style-name="P13"><text:span text:style-name="T14">позволяет формировать несколько кластеров для значений яркости</text:span></text:p>
          </draw:text-box>
        </draw:frame>
        <draw:frame draw:style-name="gr8" draw:text-style-name="P9" draw:layer="layout" svg:width="4.047cm" svg:height="1.534cm" svg:x="1.4cm" svg:y="8.266cm">
          <draw:image xlink:href="Pictures/10000001000000990000003A83A8C81E.png" xlink:type="simple" xlink:show="embed" xlink:actuate="onLoad" draw:mime-type="image/png">
            <text:p/>
          </draw:image>
        </draw:frame>
        <draw:frame draw:style-name="gr8" draw:text-style-name="P9" draw:layer="layout" svg:width="9.312cm" svg:height="7.619cm" svg:x="12.6cm" svg:y="8.381cm">
          <draw:image xlink:href="Pictures/1000000000000160000001209A51EF18.png" xlink:type="simple" xlink:show="embed" xlink:actuate="onLoad" draw:mime-type="image/png">
            <text:p/>
          </draw:image>
        </draw:frame>
        <draw:frame draw:style-name="gr8" draw:text-style-name="P9" draw:layer="layout" svg:width="8.783cm" svg:height="1.401cm" svg:x="1.417cm" svg:y="10.2cm">
          <draw:image xlink:href="Pictures/100000010000014C00000035D7F7900D.png" xlink:type="simple" xlink:show="embed" xlink:actuate="onLoad" draw:mime-type="image/png">
            <text:p/>
          </draw:image>
        </draw:frame>
        <draw:frame draw:style-name="gr17" draw:text-style-name="P16" draw:layer="layout" svg:width="24.2cm" svg:height="2.125cm" svg:x="1.2cm" svg:y="17.475cm">
          <draw:text-box>
            <text:p text:style-name="P15"><text:span text:style-name="T14">устойчивей к шуму и изменениям освещения чем простые модели</text:span></text:p>
          </draw:text-box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1" draw:text-style-name="P11" draw:layer="layout" svg:width="13.2cm" svg:height="11.067cm" svg:x="6.2cm" svg:y="5.333cm">
          <draw:text-box>
            <text:p><text:span text:style-name="T1">Модель объекта</text:span></text:p>
            <text:p text:style-name="P3"><text:span text:style-name="T8">- необходимо понимать что хотим найти</text:span></text:p>
            <text:p><text:span text:style-name="T1"/></text:p>
            <text:p><text:span text:style-name="T12">Цветовые фильтры </text:span></text:p>
            <text:p><text:span text:style-name="T12"/></text:p>
            <text:p><text:span text:style-name="T12">Выделение и анализ контуров</text:span></text:p>
            <text:p><text:span text:style-name="T12"/></text:p>
            <text:p><text:span text:style-name="T12">Сопоставление с шаблоном </text:span></text:p>
            <text:p><text:span text:style-name="T12"/></text:p>
            <text:p><text:span text:style-name="T12">Работа с особыми точками </text:span></text:p>
            <text:p><text:span text:style-name="T12"/></text:p>
            <text:p><text:span text:style-name="T12">Методы машинного обучения </text:span></text:p>
            <text:p><text:span text:style-name="T12"/></text:p>
          </draw:text-box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7" draw:layer="layout" svg:width="25cm" svg:height="4.434cm" svg:x="1.2cm" svg:y="4.4cm">
          <draw:text-box>
            <text:p><text:span text:style-name="T1">Модель объекта / </text:span><text:span text:style-name="T3">Цветовые фильтры </text:span></text:p>
            <text:p><text:span text:style-name="T3"/></text:p>
            <text:p><text:span text:style-name="T14">объект существенно отличаться от фона по цвету,</text:span></text:p>
            <text:p><text:span text:style-name="T14">Имеет однородную раскраску</text:span></text:p>
            <text:p><text:span text:style-name="T14">освещение равномерно и не изменяется</text:span></text:p>
          </draw:text-box>
        </draw:frame>
        <draw:frame draw:style-name="gr8" draw:text-style-name="P9" draw:layer="layout" svg:width="8.466cm" svg:height="6.349cm" svg:x="1cm" svg:y="9.451cm">
          <draw:image xlink:href="Pictures/1000000000000140000000F0597D7B3F.png" xlink:type="simple" xlink:show="embed" xlink:actuate="onLoad" draw:mime-type="image/png">
            <text:p/>
          </draw:image>
        </draw:frame>
        <draw:frame draw:style-name="gr8" draw:text-style-name="P9" draw:layer="layout" svg:width="8.466cm" svg:height="6.349cm" svg:x="9.6cm" svg:y="9.451cm">
          <draw:image xlink:href="Pictures/1000000000000140000000F0B1999448.png" xlink:type="simple" xlink:show="embed" xlink:actuate="onLoad" draw:mime-type="image/png">
            <text:p/>
          </draw:image>
        </draw:frame>
        <draw:frame draw:style-name="gr8" draw:text-style-name="P9" draw:layer="layout" svg:width="8.505cm" svg:height="6.398cm" svg:x="18.495cm" svg:y="9.402cm">
          <draw:image xlink:href="Pictures/10000001000001B000000145D65D6E5B.png" xlink:type="simple" xlink:show="embed" xlink:actuate="onLoad" draw:mime-type="image/png">
            <text:p/>
          </draw:image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7" draw:layer="layout" svg:width="25.152cm" svg:height="5.512cm" svg:x="1.248cm" svg:y="4.688cm">
          <draw:text-box>
            <text:p><text:span text:style-name="T1">Модель объекта / </text:span><text:span text:style-name="T3">Выделение и анализ контуров</text:span></text:p>
            <text:p><text:span text:style-name="T14"/></text:p>
            <text:p><text:span text:style-name="T19">выделяем границы на изображении (</text:span><text:span text:style-name="T14">метод Canny)</text:span></text:p>
            <text:p><text:span text:style-name="T14"/></text:p>
            <text:p><text:span text:style-name="T14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8" draw:text-style-name="P9" draw:layer="layout" svg:width="7.791cm" svg:height="4.369cm" svg:x="2.009cm" svg:y="10.231cm">
          <draw:image xlink:href="Pictures/10000000000002E40000019F4E53ACA3.png" xlink:type="simple" xlink:show="embed" xlink:actuate="onLoad" draw:mime-type="image/png">
            <text:p/>
          </draw:image>
        </draw:frame>
        <draw:frame draw:style-name="gr8" draw:text-style-name="P9" draw:layer="layout" svg:width="7.888cm" svg:height="4.424cm" svg:x="10.512cm" svg:y="10.2cm">
          <draw:image xlink:href="Pictures/10000000000002E40000019F98433EB6.png" xlink:type="simple" xlink:show="embed" xlink:actuate="onLoad" draw:mime-type="image/png">
            <text:p/>
          </draw:image>
        </draw:frame>
        <draw:frame draw:style-name="gr8" draw:text-style-name="P9" draw:layer="layout" svg:width="7.737cm" svg:height="4.339cm" svg:x="2.2cm" svg:y="15.2cm">
          <draw:image xlink:href="Pictures/10000000000002E40000019F35B3F3EE.png" xlink:type="simple" xlink:show="embed" xlink:actuate="onLoad" draw:mime-type="image/png">
            <text:p/>
          </draw:image>
        </draw:frame>
        <draw:frame draw:style-name="gr8" draw:text-style-name="P9" draw:layer="layout" svg:width="7.904cm" svg:height="4.433cm" svg:x="10.6cm" svg:y="15cm">
          <draw:image xlink:href="Pictures/10000000000002E40000019FA3BDB4D7.png" xlink:type="simple" xlink:show="embed" xlink:actuate="onLoad" draw:mime-type="image/png">
            <text:p/>
          </draw:image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14" draw:layer="layout" svg:width="23.189cm" svg:height="2.8cm" svg:x="0.8cm" svg:y="4.303cm">
          <draw:text-box>
            <text:p><text:span text:style-name="T1">Модель объекта / </text:span><text:span text:style-name="T3">Сопоставление с шаблоном</text:span></text:p>
            <text:p><text:span text:style-name="T20">ищем на большом изображении области </text:span></text:p>
            <text:p><text:span text:style-name="T20">совпадающие с изображением объекта</text:span></text:p>
          </draw:text-box>
        </draw:frame>
        <draw:frame draw:style-name="gr8" draw:text-style-name="P9" draw:layer="layout" svg:width="3.042cm" svg:height="5.449cm" svg:x="23.758cm" svg:y="5cm">
          <draw:image xlink:href="Pictures/1000000000000073000000CED7DF32B9.png" xlink:type="simple" xlink:show="embed" xlink:actuate="onLoad" draw:mime-type="image/png">
            <text:p/>
          </draw:image>
        </draw:frame>
        <draw:frame draw:style-name="gr8" draw:text-style-name="P9" draw:layer="layout" svg:width="8.289cm" svg:height="11.053cm" svg:x="1.6cm" svg:y="7.347cm">
          <draw:image xlink:href="Pictures/1000000000000180000002001129DED7.png" xlink:type="simple" xlink:show="embed" xlink:actuate="onLoad" draw:mime-type="image/png">
            <text:p/>
          </draw:image>
        </draw:frame>
        <draw:frame draw:style-name="gr8" draw:text-style-name="P9" draw:layer="layout" svg:width="8.359cm" svg:height="11.146cm" svg:x="11.641cm" svg:y="7.254cm">
          <draw:image xlink:href="Pictures/10000000000001800000020058C87A1D.png" xlink:type="simple" xlink:show="embed" xlink:actuate="onLoad" draw:mime-type="image/png">
            <text:p/>
          </draw:image>
        </draw:frame>
        <draw:frame draw:style-name="gr21" draw:text-style-name="P7" draw:layer="layout" svg:width="26cm" svg:height="1.326cm" svg:x="1.2cm" svg:y="18.674cm">
          <draw:text-box>
            <text:p><text:span text:style-name="T20">Поворот и масштабирование могут сильно портить результат <text:s/></text:span></text:p>
          </draw:text-box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2" draw:text-style-name="P14" draw:layer="layout" svg:width="15.4cm" svg:height="10.569cm" svg:x="0.9cm" svg:y="5.2cm">
          <draw:text-box>
            <text:p><text:span text:style-name="T21">особая точка</text:span><text:span text:style-name="T20"> - небольшая область, которая существенным образом выделяется на изображении (углы).</text:span></text:p>
            <text:p><text:span text:style-name="T20"/></text:p>
            <text:p><text:span text:style-name="T20">по окрестности особой точки вычисляют </text:span><text:span text:style-name="T21">дескриптор</text:span><text:span text:style-name="T20"> (SIFT, SURF, ORB)</text:span></text:p>
            <text:p><text:span text:style-name="T20"/></text:p>
            <text:p><text:span text:style-name="T20">1. На картинке с объектом ищем особые точки/дескрипторы.</text:span></text:p>
            <text:p><text:span text:style-name="T20"/></text:p>
            <text:p><text:span text:style-name="T20">2. На анализируемом изображении тоже ищем особые точки/дескрипторы.</text:span></text:p>
            <text:p><text:span text:style-name="T20"/></text:p>
            <text:p><text:span text:style-name="T20">3. Сравниваем два набора дескрипторов.</text:span></text:p>
          </draw:text-box>
        </draw:frame>
        <draw:frame draw:style-name="gr8" draw:text-style-name="P9" draw:layer="layout" svg:width="10.631cm" svg:height="12.6cm" svg:x="16.569cm" svg:y="5.2cm">
          <draw:image xlink:href="Pictures/10000000000002B3000003338B18D79F.png" xlink:type="simple" xlink:show="embed" xlink:actuate="onLoad" draw:mime-type="image/png">
            <text:p/>
          </draw:image>
        </draw:frame>
        <draw:frame draw:style-name="gr5" draw:text-style-name="P18" draw:layer="layout" svg:width="22.1cm" svg:height="1.238cm" svg:x="0.9cm" svg:y="3.962cm">
          <draw:text-box>
            <text:p><text:span text:style-name="T22">Модель объекта / <text:s/></text:span><text:span text:style-name="T23">Работа с особыми точками </text:span></text:p>
          </draw:text-box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1" draw:text-style-name="P11" draw:layer="layout" svg:width="13.2cm" svg:height="11.067cm" svg:x="5.8cm" svg:y="5.333cm">
          <draw:text-box>
            <text:p><text:span text:style-name="T1">Модель объекта</text:span></text:p>
            <text:p text:style-name="P3"><text:span text:style-name="T8">- необходимо понимать что хотим найти</text:span></text:p>
            <text:p><text:span text:style-name="T1"/></text:p>
            <text:p><text:span text:style-name="T12">Цветовые фильтры </text:span></text:p>
            <text:p><text:span text:style-name="T12"/></text:p>
            <text:p><text:span text:style-name="T12">Выделение и анализ контуров</text:span></text:p>
            <text:p><text:span text:style-name="T12"/></text:p>
            <text:p><text:span text:style-name="T12">Сопоставление с шаблоном </text:span></text:p>
            <text:p><text:span text:style-name="T12"/></text:p>
            <text:p><text:span text:style-name="T12">Работа с особыми точками </text:span></text:p>
            <text:p><text:span text:style-name="T12"/></text:p>
            <text:p><text:span text:style-name="T24">Методы машинного обучения </text:span></text:p>
            <text:p><text:span text:style-name="T12"/></text:p>
          </draw:text-box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ML обработка изображений</text:span></text:p>
          </draw:text-box>
        </draw:frame>
        <draw:frame draw:style-name="gr23" draw:text-style-name="P7" draw:layer="layout" svg:width="18.6cm" svg:height="11.555cm" svg:x="4.6cm" svg:y="5.456cm">
          <draw:text-box>
            <text:p><text:span text:style-name="T1">Модель объекта средствами ML</text:span></text:p>
            <text:p><text:s/></text:p>
            <text:p><text:span text:style-name="T25">методы извлечения признаков из картинки</text:span></text:p>
            <text:p/>
            <text:p/>
            <text:p>Гистограммы направленных градиентов (HOG)</text:p>
            <text:p><text:s/></text:p>
            <text:p>Признаки Хаара</text:p>
            <text:p/>
            <text:p text:style-name="P3">«Визуальные» слова (BoW)</text:p>
            <text:p text:style-name="P3"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ML обработка изображений</text:span></text:p>
          </draw:text-box>
        </draw:frame>
        <draw:frame draw:style-name="gr24" draw:text-style-name="P4" draw:layer="layout" svg:width="15.8cm" svg:height="5.777cm" svg:x="2.4cm" svg:y="5.6cm">
          <draw:text-box>
            <text:p><text:span text:style-name="T26">HOG - гистограммы направленных градиентов</text:span></text:p>
            <text:p text:style-name="P3"><text:span text:style-name="T7"/></text:p>
            <text:p text:style-name="P3"><text:span text:style-name="T7"/></text:p>
            <text:p text:style-name="P3"><text:span text:style-name="T7">Картинка разделяется на части (ячейки), </text:span></text:p>
            <text:p text:style-name="P3"><text:span text:style-name="T7">для каждой ячейки строим гистограмму направлений градиента яркости, далее гистограммы ячеек нормируются по контрасту и объединяются</text:span></text:p>
          </draw:text-box>
        </draw:frame>
        <draw:frame draw:style-name="gr8" draw:text-style-name="P9" draw:layer="layout" svg:width="6.293cm" svg:height="6.8cm" svg:x="19.8cm" svg:y="5.2cm">
          <draw:image xlink:href="Pictures/100000010000011E000001356BA6FEDA.png" xlink:type="simple" xlink:show="embed" xlink:actuate="onLoad" draw:mime-type="image/png">
            <text:p/>
          </draw:image>
        </draw:frame>
        <draw:frame draw:style-name="gr8" draw:text-style-name="P9" draw:layer="layout" svg:width="7.259cm" svg:height="6.737cm" svg:x="19.4cm" svg:y="12.42cm">
          <draw:image xlink:href="Pictures/100000010000014E000001360A8B849D.png" xlink:type="simple" xlink:show="embed" xlink:actuate="onLoad" draw:mime-type="image/png">
            <text:p/>
          </draw:image>
        </draw:frame>
        <draw:frame draw:style-name="gr8" draw:text-style-name="P9" draw:layer="layout" svg:width="18.467cm" svg:height="5.846cm" svg:x="0.6cm" svg:y="13.154cm">
          <draw:image xlink:href="Pictures/10000001000002BA000000DD38B55F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5" draw:text-style-name="P14" draw:layer="layout" svg:width="21.6cm" svg:height="6.2cm" svg:x="1cm" svg:y="3.8cm">
          <draw:text-box>
            <text:p><text:span text:style-name="T27">Извлечение признаков из картинки</text:span></text:p>
            <text:p><text:span text:style-name="T12"/></text:p>
            <text:p text:style-name="P3"><text:span text:style-name="T28">Признаки Хаара (Haar-like features)</text:span></text:p>
            <text:p text:style-name="P3"><text:span text:style-name="T29"/></text:p>
            <text:p text:style-name="P3"><text:span text:style-name="T30">Выбираем прямоугольную область на изображении,</text:span></text:p>
            <text:p text:style-name="P3"><text:span text:style-name="T30">разбиваем её на несколько смежных прямоугольных частей,</text:span></text:p>
            <text:p text:style-name="P3"><text:span text:style-name="T30">в каждой части суммируем яркость точек,</text:span></text:p>
            <text:p text:style-name="P3"><text:span text:style-name="T30">вычисляем разность между этими суммами.</text:span></text:p>
          </draw:text-box>
        </draw:frame>
        <draw:frame draw:style-name="gr8" draw:text-style-name="P9" draw:layer="layout" svg:width="9.4cm" svg:height="2.898cm" svg:x="1.2cm" svg:y="10.302cm">
          <draw:image xlink:href="Pictures/100000000000014E000000678A1166B2.png" xlink:type="simple" xlink:show="embed" xlink:actuate="onLoad" draw:mime-type="image/png">
            <text:p/>
          </draw:image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draw:frame draw:style-name="gr8" draw:text-style-name="P9" draw:layer="layout" svg:width="9.048cm" svg:height="7.619cm" svg:x="14.8cm" svg:y="10cm">
          <draw:image xlink:href="Pictures/10000000000001560000012001825AB1.png" xlink:type="simple" xlink:show="embed" xlink:actuate="onLoad" draw:mime-type="image/png">
            <text:p/>
          </draw:image>
        </draw:frame>
        <draw:frame draw:style-name="gr26" draw:text-style-name="P19" draw:layer="layout" svg:width="8.8cm" svg:height="1.645cm" svg:x="15.2cm" svg:y="17.8cm">
          <draw:text-box>
            <text:p><text:span text:style-name="T31">результат работы </text:span></text:p>
            <text:p><text:span text:style-name="T31">детектора лиц Виолы-Джон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ML обработка изображений</text:span></text:p>
          </draw:text-box>
        </draw:frame>
        <draw:frame draw:style-name="gr22" draw:text-style-name="P14" draw:layer="layout" svg:width="12.4cm" svg:height="10.569cm" svg:x="0.8cm" svg:y="9.2cm">
          <draw:text-box>
            <text:p><text:span text:style-name="T29">для каждого изображения, входящего в учебный набор, определяем особые точки/дескрипторы</text:span></text:p>
            <text:p text:style-name="P3"><text:span text:style-name="T29">и объединяем похожие дескрипторы в группы (кластеризация)</text:span></text:p>
            <text:p text:style-name="P3"><text:span text:style-name="T29"/></text:p>
            <text:p text:style-name="P3"><text:span text:style-name="T29">кластер дескрипторов - «визуальное» слово</text:span></text:p>
            <text:p text:style-name="P3"><text:span text:style-name="T29"/></text:p>
            <text:p text:style-name="P3"><text:span text:style-name="T29">вектор BoW-признаков - количество найденных «визуальных» слов</text:span></text:p>
          </draw:text-box>
        </draw:frame>
        <draw:frame draw:style-name="gr8" draw:text-style-name="P9" draw:layer="layout" svg:width="14.199cm" svg:height="10.586cm" svg:x="12.6cm" svg:y="9.214cm">
          <draw:image xlink:href="Pictures/10000000000004E2000003A4CF13BFBA.png" xlink:type="simple" xlink:show="embed" xlink:actuate="onLoad" draw:mime-type="image/png">
            <text:p/>
          </draw:image>
        </draw:frame>
        <draw:frame draw:style-name="gr27" draw:text-style-name="P14" draw:layer="layout" svg:width="18.024cm" svg:height="4.923cm" svg:x="1cm" svg:y="3.8cm">
          <draw:text-box>
            <text:p><text:span text:style-name="T27">Извлечение признаков из картинки</text:span></text:p>
            <text:p><text:span text:style-name="T12"/></text:p>
            <text:p><text:span text:style-name="T28">Мешок слов (BoW)</text:span></text:p>
            <text:p><text:span text:style-name="T28"/></text:p>
            <text:p><text:span text:style-name="T29">похоже на частотный анализ текстов,</text:span></text:p>
            <text:p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8" draw:text-style-name="P14" draw:layer="layout" svg:width="23.579cm" svg:height="6.884cm" svg:x="1.021cm" svg:y="4cm">
          <draw:text-box>
            <text:p text:style-name="P3"><text:span text:style-name="T32">Методы машинного обучения и локализация объектов </text:span></text:p>
            <text:p text:style-name="P3"><text:span text:style-name="T32"/></text:p>
            <text:p><text:span text:style-name="T28">метод скользящего окна</text:span></text:p>
            <text:p text:style-name="P3"><text:span text:style-name="T28"/></text:p>
            <text:p text:style-name="P3"><text:span text:style-name="T29">1.задать размер окна</text:span></text:p>
            <text:p text:style-name="P3"><text:span text:style-name="T29">2.пройти окном изображение </text:span></text:p>
            <text:p text:style-name="P3"><text:span text:style-name="T29">3.на каждом шаге выполняем классификацию содержимого окна</text:span></text:p>
            <text:p text:style-name="P3"><text:span text:style-name="T29">4.изменить размер окна и повторить процедуру с п.2</text:span></text:p>
            <text:p text:style-name="P3"><text:span text:style-name="T29">5.обрабатываем результаты</text:span></text:p>
          </draw:text-box>
        </draw:frame>
        <draw:frame draw:style-name="gr8" draw:text-style-name="P9" draw:layer="layout" svg:width="14.177cm" svg:height="7.2cm" svg:x="5.823cm" svg:y="11.6cm">
          <draw:image xlink:href="Pictures/100000000000013D000000A15A36AF8E.png" xlink:type="simple" xlink:show="embed" xlink:actuate="onLoad" draw:mime-type="image/png">
            <text:p/>
          </draw:image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9" draw:text-style-name="P14" draw:layer="layout" svg:width="15.579cm" svg:height="1.991cm" svg:x="1.621cm" svg:y="3.809cm">
          <draw:text-box>
            <text:p><text:span text:style-name="T33">Non-maximum suppression (</text:span><text:span text:style-name="T34">NMS)</text:span></text:p>
            <text:p text:style-name="P3"><text:span text:style-name="T31">оцениваем степень наложения фреймов друг на друга </text:span></text:p>
            <text:p text:style-name="P3"><text:span text:style-name="T31">и выкидываем лишнее</text:span></text:p>
          </draw:text-box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draw:custom-shape draw:style-name="gr30" draw:text-style-name="P21" xml:id="id1" draw:id="id1" draw:layer="layout" svg:width="9.2cm" svg:height="1.8cm" svg:x="1.4cm" svg:y="6.2cm">
          <text:p text:style-name="P20"><text:span text:style-name="T35">сортируем гипотезы h </text:span><text:span text:style-name="T35">(фреймы) </text:span></text:p>
          <text:p text:style-name="P20"><text:span text:style-name="T35">по убыванию оценки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xml:id="id2" draw:id="id2" draw:layer="layout" svg:width="8cm" svg:height="1.8cm" svg:x="2cm" svg:y="9cm">
          <text:p text:style-name="P22"><text:span text:style-name="T36">помещаем </text:span></text:p>
          <text:p text:style-name="P22"><text:span text:style-name="T36">отсортированные гипотезы </text:span></text:p>
          <text:p text:style-name="P22"><text:span text:style-name="T36">в очередь Q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3" draw:id="id3" draw:layer="layout" svg:width="6.8cm" svg:height="2cm" svg:x="2.6cm" svg:y="11.8cm">
          <text:p text:style-name="P22"><text:span text:style-name="T36">вынимаем из Q </text:span></text:p>
          <text:p text:style-name="P22"><text:span text:style-name="T36">первую (наилучшую) </text:span></text:p>
          <text:p text:style-name="P22"><text:span text:style-name="T36">гипотезу (h0)</text:span></text:p>
          <draw:enhanced-geometry svg:viewBox="0 0 21600 21600" draw:type="rectangle" draw:enhanced-path="M 0 0 L 21600 0 21600 21600 0 21600 0 0 Z N"/>
        </draw:custom-shape>
        <draw:frame draw:style-name="gr33" draw:text-style-name="P23" draw:layer="layout" svg:width="5.521cm" svg:height="7.137cm" svg:x="21.6cm" svg:y="5.8cm">
          <draw:image xlink:href="Pictures/100000010000010700000154C1839FEF.png" xlink:type="simple" xlink:show="embed" xlink:actuate="onLoad" draw:mime-type="image/png">
            <text:p/>
          </draw:image>
        </draw:frame>
        <draw:frame draw:style-name="gr8" draw:text-style-name="P9" draw:layer="layout" svg:width="6.501cm" svg:height="6.995cm" svg:x="19.099cm" svg:y="13.2cm">
          <draw:image xlink:href="Pictures/100000010000013C000001540538ED1C.png" xlink:type="simple" xlink:show="embed" xlink:actuate="onLoad" draw:mime-type="image/png">
            <text:p/>
          </draw:image>
        </draw:frame>
        <draw:custom-shape draw:style-name="gr34" draw:text-style-name="P22" xml:id="id4" draw:id="id4" draw:layer="layout" svg:width="7.2cm" svg:height="1.6cm" svg:x="2.4cm" svg:y="14.6cm">
          <text:p text:style-name="P22"><text:span text:style-name="T36">помещаем h0 </text:span></text:p>
          <text:p text:style-name="P22"><text:span text:style-name="T36">в список результатов R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xml:id="id5" draw:id="id5" draw:layer="layout" svg:width="8cm" svg:height="2.2cm" svg:x="2cm" svg:y="17.2cm">
          <text:p text:style-name="P22"><text:span text:style-name="T36">выкидываем из очереди Q </text:span></text:p>
          <text:p text:style-name="P22"><text:span text:style-name="T36">все гипотезы </text:span></text:p>
          <text:p text:style-name="P22"><text:span text:style-name="T37">близкие </text:span><text:span text:style-name="T36">к h0 по IoU 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xml:id="id6" draw:id="id6" draw:layer="layout" svg:width="7cm" svg:height="2.4cm" svg:x="11.6cm" svg:y="11.6cm">
          <text:p text:style-name="P22"><text:span text:style-name="T36">очередь Q пуста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6" xml:id="id7" draw:id="id7" draw:layer="layout" svg:width="6.6cm" svg:height="2.4cm" svg:x="11.8cm" svg:y="6.4cm">
          <text:p text:style-name="P22"><text:span text:style-name="T36">возвращаем </text:span></text:p>
          <text:p text:style-name="P22"><text:span text:style-name="T36">список результатов R, </text:span></text:p>
          <text:p text:style-name="P22"><text:span text:style-name="T36">конец работы <text:s text:c="3"/></text:span></text:p>
          <draw:enhanced-geometry svg:viewBox="0 0 21600 21600" draw:type="rectangle" draw:enhanced-path="M 0 0 L 21600 0 21600 21600 0 21600 0 0 Z N"/>
        </draw:custom-shape>
        <draw:connector draw:style-name="gr38" draw:text-style-name="P9" draw:layer="layout" draw:type="line" svg:x1="6cm" svg:y1="8cm" svg:x2="6cm" svg:y2="9cm" draw:start-shape="id1" draw:start-glue-point="2" draw:end-shape="id2" draw:end-glue-point="0" svg:d="M6000 8000v1000" svg:viewBox="0 0 1 1001">
          <text:p/>
        </draw:connector>
        <draw:connector draw:style-name="gr39" draw:text-style-name="P9" draw:layer="layout" draw:type="line" svg:x1="6cm" svg:y1="10.8cm" svg:x2="6cm" svg:y2="11.8cm" draw:start-shape="id2" draw:start-glue-point="2" draw:end-shape="id3" draw:end-glue-point="0" svg:d="M6000 10800v1000" svg:viewBox="0 0 1 1001">
          <text:p/>
        </draw:connector>
        <draw:connector draw:style-name="gr40" draw:text-style-name="P9" draw:layer="layout" draw:type="line" svg:x1="6cm" svg:y1="13.8cm" svg:x2="6cm" svg:y2="14.6cm" draw:start-shape="id3" draw:start-glue-point="2" draw:end-shape="id4" draw:end-glue-point="0" svg:d="M6000 13800v800" svg:viewBox="0 0 1 801">
          <text:p/>
        </draw:connector>
        <draw:connector draw:style-name="gr41" draw:text-style-name="P9" draw:layer="layout" draw:type="line" svg:x1="6cm" svg:y1="16.2cm" svg:x2="6cm" svg:y2="17.2cm" draw:start-shape="id4" draw:start-glue-point="2" draw:end-shape="id5" draw:end-glue-point="0" svg:d="M6000 16200v1000" svg:viewBox="0 0 1 1001">
          <text:p/>
        </draw:connector>
        <draw:connector draw:style-name="gr42" draw:text-style-name="P9" draw:layer="layout" svg:x1="10cm" svg:y1="18.3cm" svg:x2="15.1cm" svg:y2="14cm" draw:start-shape="id5" draw:start-glue-point="1" draw:end-shape="id6" draw:end-glue-point="6" svg:d="M10000 18300h5100v-4300" svg:viewBox="0 0 5101 4301">
          <text:p/>
        </draw:connector>
        <draw:connector draw:style-name="gr43" draw:text-style-name="P9" draw:layer="layout" draw:type="line" svg:x1="11.6cm" svg:y1="12.8cm" svg:x2="9.4cm" svg:y2="12.8cm" draw:start-shape="id6" draw:start-glue-point="5" draw:end-shape="id3" draw:end-glue-point="1" svg:d="M11600 12800h-2200" svg:viewBox="0 0 2201 1">
          <text:p/>
        </draw:connector>
        <draw:connector draw:style-name="gr44" draw:text-style-name="P9" draw:layer="layout" draw:type="line" svg:x1="15.1cm" svg:y1="11.6cm" svg:x2="15.1cm" svg:y2="8.8cm" draw:start-shape="id6" draw:start-glue-point="4" draw:end-shape="id7" draw:end-glue-point="2" svg:d="M15100 11600v-2800" svg:viewBox="0 0 1 2801">
          <text:p/>
        </draw:connector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5" draw:text-style-name="P14" draw:layer="layout" svg:width="23.579cm" svg:height="4.939cm" svg:x="1.021cm" svg:y="4cm">
          <draw:text-box>
            <text:p><text:span text:style-name="T32">Локализация объектов : </text:span><text:span text:style-name="T28">обработка результата</text:span></text:p>
            <text:p text:style-name="P3"><text:span text:style-name="T28"/></text:p>
            <text:p text:style-name="P3"><text:span text:style-name="T37">Non-maximum suppression (</text:span><text:span text:style-name="T31">NMS)</text:span></text:p>
            <text:p text:style-name="P3"><text:span text:style-name="T31"/></text:p>
            <text:p text:style-name="P3"><text:span text:style-name="T31">оцениваем степень наложения фреймов друг на друга и выкидываем лишнее</text:span></text:p>
            <text:p text:style-name="P3"><text:span text:style-name="T29"/></text:p>
            <text:p text:style-name="P3"><text:span text:style-name="T12"/></text:p>
          </draw:text-box>
        </draw:frame>
        <draw:frame draw:style-name="gr8" draw:text-style-name="P9" draw:layer="layout" svg:width="11cm" svg:height="5.587cm" svg:x="14cm" svg:y="12.613cm">
          <draw:image xlink:href="Pictures/100000000000013D000000A170D0E097.png" xlink:type="simple" xlink:show="embed" xlink:actuate="onLoad" draw:mime-type="image/png">
            <text:p/>
          </draw:image>
        </draw:frame>
        <draw:frame draw:style-name="gr8" draw:text-style-name="P9" draw:layer="layout" svg:width="11cm" svg:height="5.586cm" svg:x="1.4cm" svg:y="8.939cm">
          <draw:image xlink:href="Pictures/100000000000013D000000A15A36AF8E.png" xlink:type="simple" xlink:show="embed" xlink:actuate="onLoad" draw:mime-type="image/png">
            <text:p/>
          </draw:image>
        </draw:frame>
        <draw:frame presentation:style-name="pr5" draw:text-style-name="P8" draw:layer="layout" svg:width="16.199cm" svg:height="0.945cm" svg:x="0.802cm" svg:y="2.047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19" draw:layer="layout" svg:width="25cm" svg:height="16.14cm" svg:x="1cm" svg:y="3.66cm">
          <draw:text-box>
            <text:p text:style-name="P3"><text:span text:style-name="T38">Литература</text:span></text:p>
            <text:p text:style-name="P3"><text:span text:style-name="T39"/></text:p>
            <text:p text:style-name="P3"><text:span text:style-name="T40">Борисов Е.С. Методы машинного обучения. 2024</text:span></text:p>
            <text:p text:style-name="P3"><text:span text:style-name="T41"><text:a xlink:href="https://github.com/mechanoid5/ml_lectorium_2024_I" xlink:type="simple">https://github.com/mechanoid5/ml_lectorium_2024_I</text:a></text:span></text:p>
            <text:p text:style-name="P3"><text:span text:style-name="T41"/></text:p>
            <text:p text:style-name="P3"><text:span text:style-name="T7">Борисов Е.С. Базовые методы обработки изображений.</text:span></text:p>
            <text:p text:style-name="P3"><text:span text:style-name="T7"><text:a xlink:href="http://mechanoid.su/cv-base.html" xlink:type="simple">http://mechanoid.su/cv-base.html</text:a></text:span></text:p>
            <text:p text:style-name="P3"><text:span text:style-name="T7"/></text:p>
            <text:p text:style-name="P3"><text:span text:style-name="T36">Борисов Е.С. О задаче поиска объекта на изображении.</text:span></text:p>
            <text:p text:style-name="P3"><text:span text:style-name="T36"><text:a xlink:href="http://mechanoid.su/cv-image-detector.html" xlink:type="simple">http://mechanoid.su/cv-image-detector.html</text:a></text:span></text:p>
            <text:p text:style-name="P3"><text:span text:style-name="T36"/></text:p>
            <text:p text:style-name="P3"><text:span text:style-name="T30">Конушин А.С. Введение в компьютерное зрение. 2015</text:span></text:p>
            <text:p text:style-name="P3"><text:span text:style-name="T30"><text:a xlink:href="https://www.youtube.com/playlist?list=PL-_cKNuVAYAXAnpy8RCV8UtFrFFLRa4rh" xlink:type="simple">https://www.youtube.com/playlist?list=PL-_cKNuVAYAXAnpy8RCV8UtFrFFLRa4rh</text:a></text:span></text:p>
            <text:p text:style-name="P3"><text:span text:style-name="T30"/></text:p>
            <text:p text:style-name="P3"><text:span text:style-name="T31"/></text:p>
          </draw:text-box>
        </draw:frame>
        <draw:frame presentation:style-name="pr5" draw:text-style-name="P8" draw:layer="layout" svg:width="16.199cm" svg:height="0.945cm" svg:x="0.803cm" svg:y="2.048cm" presentation:class="title" presentation:user-transformed="true">
          <draw:text-box>
            <text:p><text:span text:style-name="T1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5-20T11:06:34.149554970</dc:date>
    <meta:editing-duration>P2DT1H49M57S</meta:editing-duration>
    <meta:editing-cycles>605</meta:editing-cycles>
    <meta:generator>LibreOffice/24.2.2.2$Linux_X86_64 LibreOffice_project/420$Build-2</meta:generator>
    <meta:document-statistic meta:object-count="183"/>
  </office:meta>
</office:document-meta>
</file>