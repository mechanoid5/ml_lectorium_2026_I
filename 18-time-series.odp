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2590000024DF20FD740.png" manifest:media-type="image/png"/>
  <manifest:file-entry manifest:full-path="Pictures/100000010000024E000001B9B7BAC82B.png" manifest:media-type="image/png"/>
  <manifest:file-entry manifest:full-path="Pictures/10000001000001A300000018A4AF0A7A.png" manifest:media-type="image/png"/>
  <manifest:file-entry manifest:full-path="Pictures/100000010000024F00000224F188BC6A.png" manifest:media-type="image/png"/>
  <manifest:file-entry manifest:full-path="Pictures/1000000100000308000001306C67E009.png" manifest:media-type="image/png"/>
  <manifest:file-entry manifest:full-path="Pictures/10000000000003050000013C841DECC3.png" manifest:media-type="image/png"/>
  <manifest:file-entry manifest:full-path="Pictures/1000000100000238000001B3AB4D1578.png" manifest:media-type="image/png"/>
  <manifest:file-entry manifest:full-path="Pictures/100000010000030C0000012FAFA344FA.png" manifest:media-type="image/png"/>
  <manifest:file-entry manifest:full-path="Pictures/10000000000003050000013C96668286.png" manifest:media-type="image/png"/>
  <manifest:file-entry manifest:full-path="Pictures/10000001000000B800000042C01B947A.png" manifest:media-type="image/png"/>
  <manifest:file-entry manifest:full-path="Pictures/1000000000000238000001B3AE756BD5.png" manifest:media-type="image/png"/>
  <manifest:file-entry manifest:full-path="Pictures/10000001000003140000013A4BBAF079.png" manifest:media-type="image/png"/>
  <manifest:file-entry manifest:full-path="Pictures/1000000000000CEC000009B1F1F5393E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2.2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3.47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11" style:family="graphic" style:parent-style-name="standard">
      <style:graphic-properties fo:min-height="2.05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23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4.1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39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40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23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922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7.3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6.945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9.321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draw:fill="none" fo:min-height="9.481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2.067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lef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text-properties fo:font-size="10pt" fo:background-color="#dddddd" style:font-size-asian="10pt" style:font-size-complex="1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left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left" fo:text-indent="0cm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background-color="transparent" style:font-size-asian="10pt" style:font-size-complex="10pt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DejaVu Sans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ы</text:span><text:span text:style-name="T1">е</text:span><text:span text:style-name="T1"> </text:span><text:span text:style-name="T1">р</text:span><text:span text:style-name="T1">я</text:span><text:span text:style-name="T1">д</text:span><text:span text:style-name="T1">ы</text:span><text:span text:style-name="T1"> </text:span><text:span text:style-name="T1">и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и</text:span><text:span text:style-name="T1"> </text:span><text:span text:style-name="T1">A</text:span><text:span text:style-name="T1">R</text:span><text:span text:style-name="T1">I</text:span><text:span text:style-name="T1">M</text:span><text:span text:style-name="T1">A</text:span><text:span text:style-name="T1">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4.5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</text:span><text:span text:style-name="T7">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1.07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</text:span><text:span text:style-name="T7">и методы</text:span></text:p>
          </draw:text-box>
        </draw:frame>
        <draw:frame draw:style-name="gr3" draw:text-style-name="P4" draw:layer="layout" svg:width="15.446cm" svg:height="6cm" svg:x="11.554cm" svg:y="7.759cm">
          <draw:image xlink:href="Pictures/100000010000030C0000012FAFA344FA.png" xlink:type="simple" xlink:show="embed" xlink:actuate="onLoad" draw:mime-type="image/png">
            <text:p/>
          </draw:image>
        </draw:frame>
        <draw:frame draw:style-name="gr3" draw:text-style-name="P4" draw:layer="layout" svg:width="15.058cm" svg:height="6cm" svg:x="1cm" svg:y="14cm">
          <draw:image xlink:href="Pictures/10000001000003140000013A4BBAF0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</text:span><text:span text:style-name="T7">основные </text:span><text:span text:style-name="T7">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3" draw:text-style-name="P4" draw:layer="layout" svg:width="10.969cm" svg:height="8.4cm" svg:x="1.431cm" svg:y="7.4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но упорядоченные и зависимые (будущее зависит от прошлого) ? </text:span></text:p>
            <text:p><text:span text:style-name="T12"/></text:p>
            <text:p><text:span text:style-name="T12"/></text:p>
            <text:p><text:span text:style-name="T11">автокорреляция</text:span><text:span text:style-name="T12"> - корреляция Пирсона ряда с тем же рядом сдвинутым на t шагов (</text:span><text:span text:style-name="T13">лаг автокорреляции</text:span><text:span text:style-name="T12">)</text:span></text:p>
          </draw:text-box>
        </draw:frame>
        <draw:frame draw:style-name="gr10" draw:text-style-name="P10" draw:layer="layout" svg:width="12.6cm" svg:height="1.895cm" svg:x="1.4cm" svg:y="16.2cm">
          <draw:text-box>
            <text:p><text:span text:style-name="T14">палки — значение автокореляции для разных лагов ;</text:span></text:p>
            <text:p><text:span text:style-name="T14"/></text:p>
            <text:p><text:span text:style-name="T14">синяя область — коридор значимости, </text:span></text:p>
            <text:p><text:span text:style-name="T14"><text:s text:c="20"/>палки вне коридора значимо отличаються от нуля ;</text:span></text:p>
          </draw:text-box>
        </draw:frame>
        <draw:frame draw:style-name="gr11" draw:text-style-name="P11" draw:layer="layout" svg:width="13.4cm" svg:height="2.306cm" svg:x="13cm" svg:y="13.6cm">
          <draw:text-box>
            <text:p text:style-name="P11"><text:span text:style-name="T15">Простое правило для определения значимости </text:span><text:span text:style-name="T15">автокорреляции:</text:span><text:span text:style-name="T15"><text:line-break/></text:span><text:span text:style-name="T15"><text:line-break/></text:span><text:span text:style-name="T15">если столбик на лаге выходит за пределы ±1.96/SQRT(N), </text:span><text:span text:style-name="T15"><text:line-break/></text:span><text:span text:style-name="T15">N — длина ря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но упорядоченные и зависимые (будущее зависит от прошлого) ? </text:span></text:p>
            <text:p><text:span text:style-name="T12"/></text:p>
            <text:p text:style-name="P12"><text:span text:style-name="T11">Частичная автокорреляция</text:span><text:span text:style-name="T12"> <text:s/>- дополнительно удаляет линейную зависимость между cдвинутыми рядами </text:span></text:p>
          </draw:text-box>
        </draw:frame>
        <draw:frame draw:style-name="gr3" draw:text-style-name="P4" draw:layer="layout" svg:width="11.13cm" svg:height="8.523cm" svg:x="1.4cm" svg:y="7.2cm">
          <draw:image xlink:href="Pictures/1000000100000238000001B3AB4D1578.png" xlink:type="simple" xlink:show="embed" xlink:actuate="onLoad" draw:mime-type="image/png">
            <text:p/>
          </draw:image>
        </draw:frame>
        <draw:frame draw:style-name="gr12" draw:text-style-name="P10" draw:layer="layout" svg:width="15.389cm" svg:height="1.484cm" svg:x="4.211cm" svg:y="16.516cm">
          <draw:text-box>
            <text:p><text:span text:style-name="T14"><text:a xlink:href="http://www.machinelearning.ru/wiki/index.php?title=Частичная_автокорреляция" xlink:type="simple">http://www.machinelearning.ru/wiki/index.php?title=Частичная_автокорреляция</text:a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3" draw:text-style-name="P8" draw:layer="layout" svg:width="26.18cm" svg:height="4.4cm" svg:x="1.02cm" svg:y="14.2cm">
          <draw:text-box>
            <text:p><text:span text:style-name="T4">тренд</text:span><text:span text:style-name="T16"> - долгосрочное (плавное) изменение ряда</text:span></text:p>
            <text:p><text:span text:style-name="T4"/></text:p>
            <text:p><text:span text:style-name="T4">сезонность</text:span><text:span text:style-name="T5"> - циклические изменения уровня ряда с </text:span><text:span text:style-name="T4">постоянным</text:span><text:span text:style-name="T5"> периодом (зима/лето)</text:span></text:p>
            <text:p><text:span text:style-name="T5"/></text:p>
            <text:p><text:span text:style-name="T4">цикл</text:span><text:span text:style-name="T5"> - циклические изменения уровня ряда с </text:span><text:span text:style-name="T4">НЕпостоянным</text:span><text:span text:style-name="T5"> периодом (экономические циклы)</text:span></text:p>
            <text:p><text:span text:style-name="T5"/></text:p>
            <text:p><text:span text:style-name="T4">ошибка</text:span><text:span text:style-name="T5"> - непрогнозируемая случайная компонента ряда</text:span></text:p>
          </draw:text-box>
        </draw:frame>
        <draw:frame draw:style-name="gr14" draw:text-style-name="P13" draw:layer="layout" svg:width="15.4cm" svg:height="2.2cm" svg:x="1.4cm" svg:y="4.4cm">
          <draw:text-box>
            <text:p><text:span text:style-name="T17">Свойства временого ряда</text:span></text:p>
          </draw:text-box>
        </draw:frame>
        <draw:frame draw:style-name="gr3" draw:text-style-name="P4" draw:layer="layout" svg:width="18.004cm" svg:height="7.052cm" svg:x="4.196cm" svg:y="5.948cm">
          <draw:image xlink:href="Pictures/1000000100000308000001306C67E0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4.702cm" svg:height="13.632cm" svg:x="1.498cm" svg:y="4.968cm">
          <draw:image xlink:href="Pictures/100000010000024F00000224F188BC6A.png" xlink:type="simple" xlink:show="embed" xlink:actuate="onLoad" draw:mime-type="image/png">
            <text:p/>
          </draw:image>
        </draw:frame>
        <draw:frame draw:style-name="gr15" draw:text-style-name="P8" draw:layer="layout" svg:width="25cm" svg:height="2.644cm" svg:x="0.6cm" svg:y="4cm">
          <draw:text-box>
            <text:p><text:span text:style-name="T18">стационарность</text:span><text:span text:style-name="T19"> - </text:span><text:span text:style-name="T19">распределение в </text:span><text:span text:style-name="T19">любом временном </text:span><text:span text:style-name="T19">окне ряда </text:span><text:span text:style-name="T19">одинаковое</text:span><text:span text:style-name="T20"> </text:span></text:p>
            <text:p><text:span text:style-name="T6"><text:s text:c="38"/></text:span></text:p>
            <text:p><text:span text:style-name="T6"/></text:p>
          </draw:text-box>
        </draw:frame>
        <draw:frame draw:style-name="gr16" draw:text-style-name="P2" draw:layer="layout" svg:width="9.6cm" svg:height="1.654cm" svg:x="16.8cm" svg:y="5.4cm">
          <draw:text-box>
            <text:p><text:span text:style-name="T9">Пример:</text:span><text:span text:style-name="T21"> </text:span><text:span text:style-name="T22">синие</text:span><text:span text:style-name="T10"> — стационарны ;</text:span></text:p>
            <text:p><text:span text:style-name="T10"/></text:p>
            <text:p text:style-name="P6"><text:span text:style-name="T23">(тренд и сезонность нестационарны)</text:span></text:p>
          </draw:text-box>
        </draw:frame>
        <draw:frame draw:style-name="gr17" draw:text-style-name="P14" draw:layer="layout" svg:width="10.546cm" svg:height="1.485cm" svg:x="16.4cm" svg:y="9cm">
          <draw:text-box>
            <text:p><text:span text:style-name="T24">критерии нестационарности ряда </text:span><text:span text:style-name="T25">Дики-Фулл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8" draw:text-style-name="P9" draw:layer="layout" svg:width="11.8cm" svg:height="8.6cm" svg:x="15.2cm" svg:y="7.043cm">
          <draw:text-box>
            <text:p text:style-name="P6"><text:span text:style-name="T26"><text:s/>преобразование Бокса-Кокса </text:span><text:span text:style-name="T27"><text:s/></text:span></text:p>
            <text:p text:style-name="P6"><text:span text:style-name="T27">( </text:span><text:span text:style-name="T12">BoxCox transform )</text:span></text:p>
            <text:p text:style-name="P6"><text:span text:style-name="T27"/></text:p>
            <text:p text:style-name="P6"><text:span text:style-name="T27">логарифмирование ряда, </text:span></text:p>
            <text:p text:style-name="P6"><text:span text:style-name="T26"/></text:p>
            <text:p text:style-name="P6"><text:span text:style-name="T12">сглаживает нарастающую амплитуду колебаний</text:span></text:p>
            <text:p text:style-name="P6"><text:span text:style-name="T12"/></text:p>
            <text:p><text:span text:style-name="T12">значения должны быть &gt; 0.</text:span></text:p>
            <text:p><text:span text:style-name="T12">сдвигаем на константу, </text:span></text:p>
            <text:p><text:span text:style-name="T12">выполняем преобразование,</text:span></text:p>
            <text:p><text:span text:style-name="T12">сдвигаем обратно</text:span></text:p>
            <text:p><text:span text:style-name="T12"/></text:p>
            <text:p><text:span text:style-name="T14">для выдачи окончательного прогноза необходимо применить обратное преобразование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4.867cm" svg:height="1.745cm" svg:x="16cm" svg:y="14.455cm">
          <draw:image xlink:href="Pictures/10000001000000B800000042C01B947A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6.766cm">
          <draw:image xlink:href="Pictures/10000001000001A300000018A4AF0A7A.png" xlink:type="simple" xlink:show="embed" xlink:actuate="onLoad" draw:mime-type="image/png">
            <text:p/>
          </draw:image>
        </draw:frame>
        <draw:frame draw:style-name="gr19" draw:text-style-name="P8" draw:layer="layout" svg:width="25.153cm" svg:height="2.172cm" svg:x="1.2cm" svg:y="4.02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7">стабилизация дисперсии </text:span></text:p>
          </draw:text-box>
        </draw:frame>
        <draw:frame draw:style-name="gr3" draw:text-style-name="P4" draw:layer="layout" svg:width="13.201cm" svg:height="9.867cm" svg:x="1.2cm" svg:y="7.333cm">
          <draw:image xlink:href="Pictures/100000010000024E000001B9B7BAC8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2.067cm" svg:x="0.802cm" svg:y="1.486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20" draw:text-style-name="P2" draw:layer="layout" svg:width="15.656cm" svg:height="7.6cm" svg:x="11.544cm" svg:y="7cm">
          <draw:text-box>
            <text:p><text:span text:style-name="T11">дифференцирование ряда</text:span><text:span text:style-name="T12"> - переход к попарным разницам: <text:s/></text:span></text:p>
            <text:p><text:span text:style-name="T12"/></text:p>
            <text:p><text:span text:style-name="T12"/></text:p>
            <text:p><text:span text:style-name="T12"/></text:p>
            <text:p><text:span text:style-name="T12">преобразует ряд в стационарный, прибивает тренды ;</text:span></text:p>
            <text:p><text:span text:style-name="T12">можно применять несколько раз последовательно ;</text:span></text:p>
            <text:p><text:span text:style-name="T12"/></text:p>
            <text:p><text:span text:style-name="T12">(применяем после стабилизации дисперсии с помощью BoxCox)</text:span></text:p>
            <text:p><text:span text:style-name="T12"/></text:p>
            <text:p><text:span text:style-name="T12"/></text:p>
            <text:p><text:span text:style-name="T12"/></text:p>
            <text:p><text:span text:style-name="T12">обратное преобразование: <text:s/></text:span></text:p>
            <text:p><text:span text:style-name="T12"/></text:p>
          </draw:text-box>
        </draw:frame>
        <draw:frame draw:style-name="gr5" draw:text-style-name="P7" draw:layer="layout" svg:width="2.317cm" svg:height="0.53cm" svg:x="17.083cm" svg:y="11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7" draw:layer="layout" svg:width="2.252cm" svg:height="0.53cm" svg:x="17.948cm" svg:y="13.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1" draw:text-style-name="P15" draw:layer="layout" svg:width="20.915cm" svg:height="2.236cm" svg:x="2.6cm" svg:y="17.6cm">
          <draw:text-box>
            <text:p><text:span text:style-name="T11">сезонное дифференцирование</text:span><text:span text:style-name="T12"> <text:s/>(вычитаем из текущего декабря предыдущий декабрь)</text:span></text:p>
            <text:p><text:span text:style-name="T12">т.е. переход к попарным разностям в соседних сезонах</text:span></text:p>
            <text:p><text:span text:style-name="T12">для прибивания сезонности</text:span></text:p>
          </draw:text-box>
        </draw:frame>
        <draw:frame draw:style-name="gr22" draw:text-style-name="P8" draw:layer="layout" svg:width="25.153cm" svg:height="2.235cm" svg:x="1.047cm" svg:y="3.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8">стабилизация дисперсии </text:span></text:p>
            <text:p text:style-name="P6"><text:span text:style-name="T27">cтабилизация тренда </text:span></text:p>
          </draw:text-box>
        </draw:frame>
        <draw:frame draw:style-name="gr3" draw:text-style-name="P4" draw:layer="layout" svg:width="10.382cm" svg:height="10.175cm" svg:x="1.018cm" svg:y="6.6cm">
          <draw:image xlink:href="Pictures/10000001000002590000024DF20FD7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2.067cm" svg:x="0.802cm" svg:y="1.48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3" draw:text-style-name="P17" draw:layer="layout" svg:width="11.402cm" svg:height="5.711cm" svg:x="8cm" svg:y="12.115cm">
          <draw:text-box>
            <text:p text:style-name="P16"><text:span text:style-name="T29">Модели прогноза </text:span></text:p>
            <text:p><text:span text:style-name="T12"/></text:p>
            <text:p><text:span text:style-name="T12">- тривиальный прогноз</text:span></text:p>
            <text:p><text:span text:style-name="T12"/></text:p>
            <text:p><text:span text:style-name="T12">- авторегрессия (AR)</text:span></text:p>
            <text:p><text:span text:style-name="T12"/></text:p>
            <text:p><text:span text:style-name="T12">- шум и скользяцее среднее (MA)</text:span></text:p>
            <text:p><text:span text:style-name="T12"/></text:p>
            <text:p><text:span text:style-name="T12">- комбинированные модели (SARIMAX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3" draw:layer="layout" svg:width="23.398cm" svg:height="2.067cm" svg:x="0.802cm" svg:y="1.48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4" draw:text-style-name="P2" draw:layer="layout" svg:width="10cm" svg:height="4.6cm" svg:x="9cm" svg:y="12.4cm">
          <draw:text-box>
            <text:p><text:span text:style-name="T11">тривиальный прогноз <text:s/></text:span></text:p>
            <text:p><text:span text:style-name="T12"/></text:p>
            <text:p><text:span text:style-name="T12">прогноз равен текущему значению</text:span></text:p>
            <text:p><text:span text:style-name="T12"/></text:p>
            <text:p><text:span text:style-name="T12"/></text:p>
            <text:p><text:span text:style-name="T12"/></text:p>
            <text:p><text:span text:style-name="T30">работает для прогноза погоды</text:span></text:p>
            <text:p><text:span text:style-name="T12"/></text:p>
          </draw:text-box>
        </draw:frame>
        <draw:frame draw:style-name="gr5" draw:text-style-name="P7" draw:layer="layout" svg:width="3.747cm" svg:height="0.719cm" svg:x="10.2cm" svg:y="14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3" draw:layer="layout" svg:width="23.398cm" svg:height="2.067cm" svg:x="0.802cm" svg:y="1.48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25" draw:text-style-name="P18" draw:layer="layout" svg:width="9cm" svg:height="1.2cm" svg:x="3.4cm" svg:y="14.4cm">
          <draw:text-box>
            <text:p text:style-name="P16"><text:span text:style-name="T31">может описывать стационарный ряд</text:span></text:p>
          </draw:text-box>
        </draw:frame>
        <draw:frame draw:style-name="gr26" draw:text-style-name="P8" draw:layer="layout" svg:width="24.48cm" svg:height="0.751cm" svg:x="2.52cm" svg:y="6.2cm">
          <draw:text-box>
            <text:p><text:span text:style-name="T29">авторегрессия</text:span><text:span text:style-name="T31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20.019cm" svg:height="4.661cm" svg:x="4.371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3" draw:layer="layout" svg:width="23.398cm" svg:height="2.067cm" svg:x="0.802cm" svg:y="1.48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27" draw:text-style-name="P8" draw:layer="layout" svg:width="17.48cm" svg:height="2.239cm" svg:x="3.2cm" svg:y="5.4cm">
          <draw:text-box>
            <text:p><text:span text:style-name="T29">скользящее среднее</text:span><text:span text:style-name="T31"> - авторегрессия на шум</text:span></text:p>
            <text:p><text:span text:style-name="T31"/></text:p>
            <text:p><text:span text:style-name="T31">моделируем значение через гаусовский шум</text:span></text:p>
            <text:p><text:span text:style-name="T31"/></text:p>
          </draw:text-box>
        </draw:frame>
        <draw:frame draw:style-name="gr5" draw:text-style-name="P7" draw:layer="layout" svg:width="20.27cm" svg:height="3.926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3" draw:layer="layout" svg:width="23.398cm" svg:height="2.067cm" svg:x="0.802cm" svg:y="1.48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27" draw:text-style-name="P8" draw:layer="layout" svg:width="17.48cm" svg:height="2.239cm" svg:x="3.12cm" svg:y="4.4cm">
          <draw:text-box>
            <text:p text:style-name="P6"><text:span text:style-name="T29">ARMA</text:span><text:span text:style-name="T31"> - авторегрессионная модель скользящего среднего</text:span></text:p>
            <text:p text:style-name="P6"><text:span text:style-name="T31"/></text:p>
            <text:p text:style-name="P6"><text:span text:style-name="T31">комбинация AR(p) и МA(q)</text:span></text:p>
            <text:p><text:span text:style-name="T31"/></text:p>
          </draw:text-box>
        </draw:frame>
        <draw:frame draw:style-name="gr5" draw:text-style-name="P7" draw:layer="layout" svg:width="20.27cm" svg:height="6.047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8" draw:text-style-name="P2" draw:layer="layout" svg:width="21.711cm" svg:height="2.371cm" svg:x="2.6cm" svg:y="12.229cm">
          <draw:text-box>
            <text:p><text:span text:style-name="T11"/></text:p>
            <text:p><text:span text:style-name="T11">теорема Вольда</text:span><text:span text:style-name="T12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6" draw:layer="layout" svg:width="22.6cm" svg:height="2.067cm" svg:x="1.4cm" svg:y="1.56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29" draw:text-style-name="P19" draw:layer="layout" svg:width="17.48cm" svg:height="2.239cm" svg:x="3.12cm" svg:y="4.4cm">
          <draw:text-box>
            <text:p text:style-name="P6"><text:span text:style-name="T29">SARMA</text:span><text:span text:style-name="T32"> - ARMA c учётом сезонности периода S</text:span></text:p>
            <text:p text:style-name="P6"><text:span text:style-name="T31"/></text:p>
            <text:p text:style-name="P6"><text:span text:style-name="T31"/></text:p>
            <text:p><text:span text:style-name="T31"/></text:p>
          </draw:text-box>
        </draw:frame>
        <draw:frame draw:style-name="gr5" draw:text-style-name="P7" draw:layer="layout" svg:width="20.423cm" svg:height="6.053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0" draw:text-style-name="P2" draw:layer="layout" svg:width="22.316cm" svg:height="4.57cm" svg:x="2.884cm" svg:y="11.43cm">
          <draw:text-box>
            <text:p><text:span text:style-name="T12"><text:s/></text:span></text:p>
            <text:p><text:span text:style-name="T12"/></text:p>
            <text:p><text:span text:style-name="T12">дополнительные компоненты с шагом S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6" draw:layer="layout" svg:width="22.4cm" svg:height="2.067cm" svg:x="1.4cm" svg:y="1.56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31" draw:text-style-name="P19" draw:layer="layout" svg:width="17.48cm" svg:height="3.727cm" svg:x="4.6cm" svg:y="7cm">
          <draw:text-box>
            <text:p text:style-name="P6"><text:span text:style-name="T31"/></text:p>
            <text:p text:style-name="P6"><text:span text:style-name="T29">ARIMA</text:span><text:span text:style-name="T31"> - autoregressive integrated moving average</text:span></text:p>
            <text:p text:style-name="P6"><text:span text:style-name="T31"/></text:p>
            <text:p text:style-name="P6"><text:span text:style-name="T31"/></text:p>
            <text:p text:style-name="P6"><text:span text:style-name="T31">ARIMA(p,d,q) <text:s/>- <text:s/>к d раз продифференцированному ВР применяем ARMA(p,q)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16" draw:layer="layout" svg:width="22.4cm" svg:height="2.067cm" svg:x="1.4cm" svg:y="1.56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32" draw:text-style-name="P19" draw:layer="layout" svg:width="17.48cm" svg:height="4.223cm" svg:x="4.6cm" svg:y="7cm">
          <draw:text-box>
            <text:p text:style-name="P6"><text:span text:style-name="T29">SARIMA</text:span><text:span text:style-name="T31"> - добавление сезонности к ARIMA</text:span></text:p>
            <text:p text:style-name="P6"><text:span text:style-name="T31"/></text:p>
            <text:p text:style-name="P6"><text:span text:style-name="T31"/></text:p>
            <text:p text:style-name="P6"><text:span text:style-name="T31">SARIMA(p,d,q) x (P,D,Q)</text:span></text:p>
            <text:p text:style-name="P6"><text:span text:style-name="T31"/></text:p>
            <text:p text:style-name="P6"><text:span text:style-name="T31">применяем d раз обычное дифференцирование </text:span></text:p>
            <text:p text:style-name="P6"><text:span text:style-name="T31">и D раз - сезонное (с шагом S)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0" draw:text-style-name="P16" draw:layer="layout" svg:width="22.4cm" svg:height="2.067cm" svg:x="1.4cm" svg:y="1.566cm" presentation:class="title" presentation:user-transformed="true">
          <draw:text-box>
            <text:p text:style-name="P16"><text:span text:style-name="T7">Временные ряды: модели для прогнозирования</text:span></text:p>
          </draw:text-box>
        </draw:frame>
        <draw:frame draw:style-name="gr33" draw:text-style-name="P19" draw:layer="layout" svg:width="17.48cm" svg:height="3.231cm" svg:x="4.6cm" svg:y="7cm">
          <draw:text-box>
            <text:p text:style-name="P6"><text:span text:style-name="T29">SARIMAX</text:span><text:span text:style-name="T31"> - дополнительные признаки к SARIMA</text:span></text:p>
            <text:p text:style-name="P6"><text:span text:style-name="T31"/></text:p>
            <text:p text:style-name="P6"><text:span text:style-name="T31"/></text:p>
            <text:p text:style-name="P6"><text:span text:style-name="T31">например: бинарный признак "в этот день праздник"</text:span></text:p>
            <text:p text:style-name="P6"><text:span text:style-name="T31"/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21" draw:text-style-name="P16" draw:layer="layout" svg:width="22.4cm" svg:height="2cm" svg:x="1.4cm" svg:y="1.6cm" presentation:class="title" presentation:user-transformed="true">
          <draw:text-box>
            <text:p text:style-name="P16"><text:span text:style-name="T7">Временные ряды: оценка результата</text:span></text:p>
          </draw:text-box>
        </draw:frame>
        <draw:frame draw:style-name="gr34" draw:text-style-name="P2" draw:layer="layout" svg:width="17.512cm" svg:height="7.195cm" svg:x="4.488cm" svg:y="6.2cm">
          <draw:text-box>
            <text:p><text:span text:style-name="T11">оценка результата -</text:span><text:span text:style-name="T33"> метрика AIC (критерий Акаике)</text:span></text:p>
            <text:p><text:span text:style-name="T11"/></text:p>
            <text:p><text:span text:style-name="T11"/></text:p>
            <text:p><text:span text:style-name="T11"/></text:p>
            <text:p><text:span text:style-name="T11">остаток</text:span><text:span text:style-name="T12"> - разница между фактом и прогнозом</text:span></text:p>
            <text:p><text:span text:style-name="T12"/></text:p>
            <text:p><text:span text:style-name="T12">остатки должны быть</text:span></text:p>
            <text:p><text:span text:style-name="T12"/></text:p>
            <text:p><text:span text:style-name="T12">- несмещённые т.е. среднее должно быть близко к нулю</text:span></text:p>
            <text:p><text:span text:style-name="T12"/></text:p>
            <text:p><text:span text:style-name="T12">- стационарными т.е. не зависеть от времени</text:span></text:p>
            <text:p><text:span text:style-name="T12"/></text:p>
            <text:p><text:span text:style-name="T12">- неавтокоррелироваными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22" draw:text-style-name="P16" draw:layer="layout" svg:width="22.4cm" svg:height="2cm" svg:x="1.4cm" svg:y="1.6cm" presentation:class="title" presentation:user-transformed="true">
          <draw:text-box>
            <text:p text:style-name="P16"><text:span text:style-name="T7">Временные ряды: оценка результата</text:span></text:p>
          </draw:text-box>
        </draw:frame>
        <draw:frame draw:style-name="gr35" draw:text-style-name="P2" draw:layer="layout" svg:width="25.8cm" svg:height="9.571cm" svg:x="1cm" svg:y="4.629cm">
          <draw:text-box>
            <text:p><text:span text:style-name="T11">Подбор гиперпараметров модели <text:s/>SARIMA (p,d,q),(P,D,Q)</text:span></text:p>
            <text:p><text:span text:style-name="T12"/></text:p>
            <text:p><text:span text:style-name="T12">d,D (количество дифференцирований) выбираем минимально необходимое для стационарности ряда </text:span></text:p>
            <text:p><text:span text:style-name="T12"/></text:p>
            <text:p><text:span text:style-name="T12"/></text:p>
            <text:p><text:span text:style-name="T12">строим график автокорреляции</text:span></text:p>
            <text:p><text:span text:style-name="T12"/></text:p>
            <text:p><text:span text:style-name="T12">q - номер последнего НЕсезонного лага, при котором автокорреляция значима, но меньше длинны сезона ;</text:span></text:p>
            <text:p><text:span text:style-name="T12">Q - номер последнего сезонного лага, при котором автокорреляция значима ;</text:span></text:p>
            <text:p><text:span text:style-name="T12"/></text:p>
            <text:p><text:span text:style-name="T12"/></text:p>
            <text:p><text:span text:style-name="T12">строим график частичной автокорреляции</text:span></text:p>
            <text:p><text:span text:style-name="T12"/></text:p>
            <text:p><text:span text:style-name="T12">p - номер последнего НЕсезонного лага, при котором автокорреляция значима, но меньше длинны сезона ;</text:span></text:p>
            <text:p><text:span text:style-name="T12">P - номер последнего сезонного лага, при котором автокорреляция значима ;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23" draw:text-style-name="P16" draw:layer="layout" svg:width="22.4cm" svg:height="2.067cm" svg:x="1.4cm" svg:y="1.566cm" presentation:class="title" presentation:user-transformed="true">
          <draw:text-box>
            <text:p text:style-name="P16"><text:span text:style-name="T7">Временные ряды: схема применения моделей</text:span></text:p>
          </draw:text-box>
        </draw:frame>
        <draw:frame draw:style-name="gr36" draw:text-style-name="P19" draw:layer="layout" svg:width="25.4cm" svg:height="10.175cm" svg:x="1.2cm" svg:y="4cm">
          <draw:text-box>
            <text:p text:style-name="P6"><text:span text:style-name="T29">Общая схема построения модели ARIMA</text:span></text:p>
            <text:p text:style-name="P6"><text:span text:style-name="T31"/></text:p>
            <text:p text:style-name="P6"><text:span text:style-name="T31"/></text:p>
            <text:p text:style-name="P6"><text:span text:style-name="T31">- визуальная оценка графика ряда</text:span></text:p>
            <text:p text:style-name="P6"><text:span text:style-name="T31"/></text:p>
            <text:p text:style-name="P6"><text:span text:style-name="T31">- стабилизируем дисперсию (Бокс-Кокс)</text:span></text:p>
            <text:p text:style-name="P6"><text:span text:style-name="T31"/></text:p>
            <text:p text:style-name="P6"><text:span text:style-name="T31">- преобразуем в стационарный, подбираем порядок дифференцирования d,D (критерий Дики-Фуллера) </text:span></text:p>
            <text:p text:style-name="P6"><text:span text:style-name="T31"/></text:p>
            <text:p text:style-name="P6"><text:span text:style-name="T31">- анализируем автокорреляции подбираем p,q и P,Q</text:span></text:p>
            <text:p text:style-name="P6"><text:span text:style-name="T31"/></text:p>
            <text:p text:style-name="P6"><text:span text:style-name="T31">- обучаем модель </text:span></text:p>
            <text:p text:style-name="P6"><text:span text:style-name="T31"/></text:p>
            <text:p text:style-name="P6"><text:span text:style-name="T34">- выполняем обратные преобразования (дифференцирование,</text:span><text:span text:style-name="T31">логарифмирование) для выдачи прогноза</text:span></text:p>
            <text:p text:style-name="P6"><text:span text:style-name="T31"/></text:p>
            <text:p text:style-name="P6"><text:span text:style-name="T31">- оцениваем по AIC (критерий Акаике) </text:span></text:p>
            <text:p text:style-name="P6"><text:span text:style-name="T31"/></text:p>
            <text:p text:style-name="P6"><text:span text:style-name="T31">- оцениваем остатки (разница между прогнозом и тестовыми данными)</text:span></text:p>
            <text:p text:style-name="P6"><text:span text:style-name="T31"/></text:p>
            <text:p text:style-name="P6"><text:span text:style-name="T31"/></text:p>
          </draw:text-box>
        </draw:frame>
        <draw:frame draw:style-name="gr37" draw:text-style-name="P2" draw:layer="layout" svg:width="25.712cm" svg:height="5.411cm" svg:x="1.2cm" svg:y="14.389cm">
          <draw:text-box>
            <text:p><text:span text:style-name="T11">эвристики для улучшения результата</text:span></text:p>
            <text:p><text:span text:style-name="T12"/></text:p>
            <text:p><text:span text:style-name="T12">- суммы за месяц можно делить на количество дней в месяце</text:span></text:p>
            <text:p><text:span text:style-name="T12"/></text:p>
            <text:p><text:span text:style-name="T12">- если в начале ряда имеем аномалию, то её можно обрезать </text:span></text:p>
            <text:p><text:span text:style-name="T12"/></text:p>
            <text:p><text:span text:style-name="T12">- выбросы оказывают значительное влияние на результат ARIMA, их стоит выкинуть (заменить на N/A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24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8" draw:text-style-name="P20" draw:layer="layout" svg:width="25cm" svg:height="10.691cm" svg:x="1.2cm" svg:y="5.8cm">
          <draw:text-box>
            <text:p text:style-name="P6"><text:span text:style-name="T35">Борисов Е.С. Методы машинного обучения. 2024</text:span></text:p>
            <text:p text:style-name="P6"><text:span text:style-name="T36"><text:a xlink:href="https://github.com/mechanoid5/ml_lectorium_2024_I" xlink:type="simple">https://github.com/mechanoid5/ml_lectorium_2024_I</text:a></text:span></text:p>
            <text:p><text:span text:style-name="T37"/></text:p>
            <text:p><text:span text:style-name="T38"/></text:p>
            <text:p><text:span text:style-name="T39">Дмитрий Макаров <text:s text:c="2"/>Временные ряды</text:span></text:p>
            <text:p><text:span text:style-name="T39"><text:a xlink:href="https://www.dmitrymakarov.ru/intro/time-series-20/" xlink:type="simple">https://www.dmitrymakarov.ru/intro/time-series-20/</text:a></text:span></text:p>
            <text:p><text:span text:style-name="T39"/></text:p>
            <text:p><text:span text:style-name="T39"/></text:p>
            <text:p><text:span text:style-name="T39">Евгений Рябенко <text:s text:c="4"/>Прогнозирование временных рядов</text:span></text:p>
            <text:p><text:span text:style-name="T39"><text:a xlink:href="https://www.youtube.com/watch?v=u433nrxdf5k" xlink:type="simple">https://www.youtube.com/watch?v=u433nrxdf5k</text:a></text:span></text:p>
            <text:p><text:span text:style-name="T39"/></text:p>
            <text:p><text:span text:style-name="T39"/></text:p>
            <text:p><text:span text:style-name="T39">Рон Хайндман и Джордж Атанасопулос</text:span></text:p>
            <text:p><text:span text:style-name="T39">Прогнозирование: принципы и практика / пер. с англ. А. В. Логунова. – М.:</text:span></text:p>
            <text:p><text:span text:style-name="T39">ДМК Пресс, 2023. – 458 с.: ил.</text:span></text:p>
            <text:p><text:span text:style-name="T39">ISBN 978-5-93700-151-1</text:span></text:p>
            <text:list text:style-name="L2">
              <text:list-header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5-16T10:42:42.537905937</dc:date>
    <meta:editing-duration>P2DT4H47M57S</meta:editing-duration>
    <meta:editing-cycles>619</meta:editing-cycles>
    <meta:generator>LibreOffice/26.2.2.2$Linux_X86_64 LibreOffice_project/620$Build-2</meta:generator>
    <meta:print-date>2024-04-24T14:06:10.896919457</meta:print-date>
    <meta:printed-by>Файлы PDF</meta:printed-by>
    <meta:document-statistic meta:object-count="16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y</mi>
                <mn>1</mn>
              </msub>
              <mi>,</mi>
              <mo stretchy="false">…</mo>
              <mi>,</mi>
              <msub>
                <mi>y</mi>
                <mi>t</mi>
              </msub>
            </mrow>
          </mrow>
          <mo fence="true" form="postfix" stretchy="false">)</mo>
        </mrow>
        <mo stretchy="false">=</mo>
        <msub>
          <mi>y</mi>
          <mi>t</mi>
        </msub>
      </mrow>
    </mrow>
    <annotation encoding="StarMath 5.0">f(y_1, dotslow ,y_t) = y_t 
</annotation>
  </semantics>
</math>
</file>

<file path=Object 12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1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