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9">
      <style:graphic-properties draw:stroke="none" draw:fill="none" fo:min-height="14.868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267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c9211e" loext:opacity="100%"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17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BF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26cm" svg:height="15.118cm" svg:x="1cm" svg:y="4.882cm">
          <draw:text-box>
            <text:p><text:span text:style-name="T4">способы организации данных и типы задач ML <text:s/></text:span></text:p>
            <text:p><text:span text:style-name="T5"/></text:p>
            <text:p><text:span text:style-name="T6">supervised learning</text:span><text:span text:style-name="T7"> </text:span></text:p>
            <text:p><text:span text:style-name="T8">- размеченный датасет {</text:span><text:span text:style-name="T9">X,target}</text:span><text:span text:style-name="T8">, (регрессия, классификация)</text:span></text:p>
            <text:p><text:span text:style-name="T8"/></text:p>
            <text:p><text:span text:style-name="T10"/></text:p>
            <text:p><text:span text:style-name="T6">unsupervised learning</text:span><text:span text:style-name="T7"> </text:span></text:p>
            <text:p><text:span text:style-name="T8">- НЕразмеченный датасет </text:span><text:span text:style-name="T9">{X}</text:span><text:span text:style-name="T8"> (кластеризация)</text:span></text:p>
            <text:p><text:span text:style-name="T11"/></text:p>
            <text:p><text:span text:style-name="T12"/></text:p>
            <text:p><text:span text:style-name="T13">semi-supervised learning</text:span><text:span text:style-name="T14"> </text:span></text:p>
            <text:p><text:span text:style-name="T11">- частично размеченный датасет </text:span><text:span text:style-name="T8">{</text:span><text:span text:style-name="T9">X,target,X’}</text:span><text:span text:style-name="T8">, (трансдуктивные модели)</text:span></text:p>
            <text:p><text:span text:style-name="T15"/></text:p>
            <text:p><text:span text:style-name="T15"/></text:p>
            <text:p><text:span text:style-name="T16">reinforcement learning</text:span><text:span text:style-name="T17"> </text:span></text:p>
            <text:p><text:span text:style-name="T15">- нет датасета { ??? }</text:span></text:p>
            <text:p><text:span text:style-name="T8"/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3">RBF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3" draw:text-style-name="P2" draw:layer="layout" svg:width="26.4cm" svg:height="13.517cm" svg:x="1cm" svg:y="3.8cm">
          <draw:text-box>
            <text:p><text:span text:style-name="T18">git clone </text:span><text:span text:style-name="T19"><text:a xlink:href="https://github.com/mechanoid5/ml_lectorium.git" xlink:type="simple">https://github.com/mechanoid5/ml_lectorium.git</text:a></text:span></text:p>
            <text:p><text:span text:style-name="T19"/></text:p>
            <text:p><text:span text:style-name="T19"/></text:p>
            <text:p><text:span text:style-name="T20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</draw:text-box>
        </draw:frame>
        <draw:frame presentation:style-name="pr3" draw:text-style-name="P3" draw:layer="layout" svg:width="24.6cm" svg:height="2cm" svg:x="0.6cm" svg:y="1.6cm" presentation:class="title" presentation:user-transformed="true">
          <draw:text-box>
            <text:p text:style-name="P3"><text:span text:style-name="T21">RBF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6-13T21:32:17.718313875</dc:date>
    <meta:editing-duration>P2DT4H42M36S</meta:editing-duration>
    <meta:editing-cycles>648</meta:editing-cycles>
    <meta:generator>LibreOffice/26.2.2.2$Linux_X86_64 LibreOffice_project/620$Build-2</meta:generator>
    <meta:document-statistic meta:object-count="44"/>
  </office:meta>
</office:document-meta>
</file>