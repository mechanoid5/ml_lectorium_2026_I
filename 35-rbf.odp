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4C0000050441CF74E5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Обычный_5f_2_5f_2_5f_1">
      <style:graphic-properties draw:stroke="none" draw:fill="none" fo:min-height="13.267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6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RBF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 text:style-name="P2">RBF</text:p>
          </draw:text-box>
        </draw:frame>
        <draw:frame draw:style-name="gr2" draw:text-style-name="P3" draw:layer="layout" svg:width="21.914cm" svg:height="13.247cm" svg:x="2.886cm" svg:y="5.4cm">
          <draw:image xlink:href="Pictures/100000010000084C0000050441CF74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3" draw:text-style-name="P5" draw:layer="layout" svg:width="26.4cm" svg:height="13.517cm" svg:x="1cm" svg:y="3.8cm">
          <draw:text-box>
            <text:p><text:span text:style-name="T4">git clone </text:span><text:span text:style-name="T5"><text:a xlink:href="https://github.com/mechanoid5/ml_lectorium.git" xlink:type="simple">https://github.com/mechanoid5/ml_lectorium.git</text:a></text:span></text:p>
            <text:p><text:span text:style-name="T5"/></text:p>
            <text:p><text:span text:style-name="T5"/></text:p>
            <text:p><text:span text:style-name="T6">https://habr.com/ru/articles/814343/</text:span></text:p>
            <text:p><text:span text:style-name="T5"/></text:p>
            <text:p><text:span text:style-name="T5"/></text:p>
            <text:p><text:span text:style-name="T7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presentation:style-name="pr3" draw:text-style-name="P2" draw:layer="layout" svg:width="24.6cm" svg:height="2cm" svg:x="0.6cm" svg:y="1.6cm" presentation:class="title" presentation:user-transformed="true">
          <draw:text-box>
            <text:p text:style-name="P2"><text:span text:style-name="T8">RBF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6-13T22:08:09.256692235</dc:date>
    <meta:editing-duration>P2DT4H45M52S</meta:editing-duration>
    <meta:editing-cycles>649</meta:editing-cycles>
    <meta:generator>LibreOffice/26.2.2.2$Linux_X86_64 LibreOffice_project/620$Build-2</meta:generator>
    <meta:document-statistic meta:object-count="44"/>
  </office:meta>
</office:document-meta>
</file>