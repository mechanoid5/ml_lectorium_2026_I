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357000000FEBADCB8FD.png" manifest:media-type="image/png"/>
  <manifest:file-entry manifest:full-path="Pictures/10000001000002AF000001CB902ECDA2.png" manifest:media-type="image/png"/>
  <manifest:file-entry manifest:full-path="Pictures/100000000000024D000001FC677A34A3.png" manifest:media-type="image/png"/>
  <manifest:file-entry manifest:full-path="Pictures/100000010000014D00000116DD29174B.png" manifest:media-type="image/png"/>
  <manifest:file-entry manifest:full-path="Pictures/10000001000001A7000001596721F961.png" manifest:media-type="image/png"/>
  <manifest:file-entry manifest:full-path="Pictures/100000010000014900000120793AB7EA.png" manifest:media-type="image/png"/>
  <manifest:file-entry manifest:full-path="Pictures/10000001000001440000011B393A8271.png" manifest:media-type="image/png"/>
  <manifest:file-entry manifest:full-path="Pictures/10000001000002700000006F6D7FD7E2.png" manifest:media-type="image/png"/>
  <manifest:file-entry manifest:full-path="Pictures/1000000000000CEC000009B1F1F5393E.png" manifest:media-type="image/png"/>
  <manifest:file-entry manifest:full-path="Pictures/10000001000001680000016805C71104.png" manifest:media-type="image/png"/>
  <manifest:file-entry manifest:full-path="Pictures/10000001000001BF0000016B99B4308D.png" manifest:media-type="image/png"/>
  <manifest:file-entry manifest:full-path="Pictures/100000010000014B00000125C4DD4C34.png" manifest:media-type="image/png"/>
  <manifest:file-entry manifest:full-path="Pictures/1000000100000239000000B62B98E63B.png" manifest:media-type="image/png"/>
  <manifest:file-entry manifest:full-path="Pictures/10000001000002060000016187DE5FB3.png" manifest:media-type="image/png"/>
  <manifest:file-entry manifest:full-path="Pictures/1000000100000288000001B06040B118.png" manifest:media-type="image/png"/>
  <manifest:file-entry manifest:full-path="Pictures/1000000100000168000001683FE70C3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9">
      <style:graphic-properties draw:stroke="none" draw:fill="none" fo:min-height="12.068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79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" style:family="graphic" style:parent-style-name="Обычный_5f_1_5f_1_5f_1_5f_16_5f_2_5f_1_5f_2">
      <style:graphic-properties draw:stroke="none" draw:fill="none" fo:min-height="2.95cm" loext:decorative="false"/>
      <style:paragraph-properties style:writing-mode="lr-tb"/>
    </style:style>
    <style:style style:name="gr8" style:family="graphic" style:parent-style-name="Обычный_5f_1_5f_1_5f_1_5f_17_5f_2">
      <style:graphic-properties draw:fill-color="#729fcf" draw:textarea-horizontal-align="justify" draw:textarea-vertical-align="middle" draw:auto-grow-height="false" fo:min-height="2.75cm" fo:min-width="7.5cm" style:writing-mode="lr-tb" loext:decorative="false"/>
      <style:paragraph-properties style:writing-mode="lr-tb"/>
    </style:style>
    <style:style style:name="gr9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 style:writing-mode="lr-tb" loext:decorative="false"/>
      <style:paragraph-properties style:writing-mode="lr-tb"/>
    </style:style>
    <style:style style:name="gr11" style:family="graphic" style:parent-style-name="Объект_20_без_20_заливки_5f_2_5f_4">
      <style:graphic-properties draw:marker-end="Arrow" draw:marker-end-width="0.3cm" draw:fill="none" draw:textarea-vertical-align="middle" loext:decorative="false"/>
    </style:style>
    <style:style style:name="gr12" style:family="graphic" style:parent-style-name="Объект_20_без_20_заливки_5f_2_5f_4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3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14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 style:writing-mode="lr-tb" loext:decorative="false"/>
      <style:paragraph-properties style:writing-mode="lr-tb"/>
    </style:style>
    <style:style style:name="gr15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16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17" style:family="graphic" style:parent-style-name="Обычный_5f_1_5f_1_5f_1_5f_17_5f_2">
      <style:graphic-properties draw:fill="solid" draw:fill-color="#ffdbb6" draw:textarea-horizontal-align="justify" draw:textarea-vertical-align="middle" draw:auto-grow-height="false" fo:min-height="6.55cm" fo:min-width="8.3cm" style:writing-mode="lr-tb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Обычный_5f_1_5f_1_5f_1_5f_16_5f_4">
      <style:graphic-properties draw:stroke="none" draw:fill="none" fo:min-height="2.457cm" loext:decorative="false"/>
      <style:paragraph-properties style:writing-mode="lr-tb"/>
    </style:style>
    <style:style style:name="gr20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 style:writing-mode="lr-tb" loext:decorative="false"/>
      <style:paragraph-properties style:writing-mode="lr-tb"/>
    </style:style>
    <style:style style:name="gr21" style:family="graphic" style:parent-style-name="Обычный_5f_1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2" style:family="graphic" style:parent-style-name="Обычный_5f_1">
      <style:graphic-properties draw:textarea-horizontal-align="justify" draw:textarea-vertical-align="middle" draw:auto-grow-height="false" fo:min-height="1.75cm" fo:min-width="7.5cm" style:writing-mode="lr-tb" loext:decorative="false"/>
      <style:paragraph-properties style:writing-mode="lr-tb"/>
    </style:style>
    <style:style style:name="gr23" style:family="graphic" style:parent-style-name="Обычный_5f_1">
      <style:graphic-properties draw:fill-color="#ffe994" draw:textarea-horizontal-align="justify" draw:textarea-vertical-align="middle" draw:auto-grow-height="false" fo:min-height="1.35cm" fo:min-width="2cm" style:writing-mode="lr-tb" loext:decorative="false"/>
      <style:paragraph-properties style:writing-mode="lr-tb"/>
    </style:style>
    <style:style style:name="gr24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5" style:family="graphic" style:parent-style-name="Обычный_5f_1">
      <style:graphic-properties draw:fill-color="#ff4000" draw:textarea-horizontal-align="justify" draw:textarea-vertical-align="middle" draw:auto-grow-height="false" fo:min-height="0.75cm" fo:min-width="2.7cm" style:writing-mode="lr-tb" loext:decorative="false"/>
      <style:paragraph-properties style:writing-mode="lr-tb"/>
    </style:style>
    <style:style style:name="gr26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5cm" style:writing-mode="lr-tb" loext:decorative="false"/>
      <style:paragraph-properties style:writing-mode="lr-tb"/>
    </style:style>
    <style:style style:name="gr27" style:family="graphic" style:parent-style-name="Обычный_5f_1">
      <style:graphic-properties draw:fill="solid" draw:fill-color="#fff5ce" draw:textarea-horizontal-align="justify" draw:textarea-vertical-align="middle" draw:auto-grow-height="false" fo:min-height="2.15cm" fo:min-width="9.9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29" style:family="graphic" style:parent-style-name="Обычный_5f_1_5f_1_5f_1_5f_16_5f_4">
      <style:graphic-properties draw:stroke="none" draw:fill="none" fo:min-height="1.95cm" loext:decorative="false"/>
      <style:paragraph-properties style:writing-mode="lr-tb"/>
    </style:style>
    <style:style style:name="gr30" style:family="graphic" style:parent-style-name="Обычный_5f_1_5f_1_5f_1_5f_16_5f_4">
      <style:graphic-properties draw:stroke="none" draw:fill="none" fo:min-height="0.615cm" loext:decorative="false"/>
      <style:paragraph-properties style:writing-mode="lr-tb"/>
    </style:style>
    <style:style style:name="gr31" style:family="graphic" style:parent-style-name="Обычный_5f_1_5f_1_5f_1_5f_16_5f_4">
      <style:graphic-properties draw:stroke="none" draw:fill="none" fo:min-height="1.229cm" loext:decorative="false"/>
      <style:paragraph-properties style:writing-mode="lr-tb"/>
    </style:style>
    <style:style style:name="gr32" style:family="graphic" style:parent-style-name="Обычный_5f_1">
      <style:graphic-properties draw:fill-color="#81d41a" draw:textarea-horizontal-align="justify" draw:textarea-vertical-align="middle" draw:auto-grow-height="false" fo:min-height="1.35cm" fo:min-width="9.3cm" style:writing-mode="lr-tb" loext:decorative="false"/>
      <style:paragraph-properties style:writing-mode="lr-tb"/>
    </style:style>
    <style:style style:name="gr33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3cm" style:writing-mode="lr-tb" loext:decorative="false"/>
      <style:paragraph-properties style:writing-mode="lr-tb"/>
    </style:style>
    <style:style style:name="gr34" style:family="graphic" style:parent-style-name="Обычный_5f_1">
      <style:graphic-properties draw:fill="solid" draw:fill-color="#fff5ce" draw:textarea-horizontal-align="justify" draw:textarea-vertical-align="middle" draw:auto-grow-height="false" fo:min-height="1.35cm" fo:min-width="11.7cm" style:writing-mode="lr-tb" loext:decorative="false"/>
      <style:paragraph-properties style:writing-mode="lr-tb"/>
    </style:style>
    <style:style style:name="gr35" style:family="graphic" style:parent-style-name="Обычный_5f_1">
      <style:graphic-properties draw:fill="solid" draw:fill-color="#ffb66c" draw:textarea-horizontal-align="justify" draw:textarea-vertical-align="middle" draw:auto-grow-height="false" fo:min-height="1.35cm" fo:min-width="10.5cm" style:writing-mode="lr-tb" loext:decorative="false"/>
      <style:paragraph-properties style:writing-mode="lr-tb"/>
    </style:style>
    <style:style style:name="gr36" style:family="graphic" style:parent-style-name="Обычный_5f_1">
      <style:graphic-properties draw:fill-color="#ffe994" draw:textarea-horizontal-align="justify" draw:textarea-vertical-align="middle" draw:auto-grow-height="false" fo:min-height="1.15cm" fo:min-width="4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Стили_20_стрелок_20_6" draw:marker-end-width="0.3cm" draw:fill="none" draw:textarea-vertical-align="middle" loext:decorative="false"/>
      <style:paragraph-properties style:writing-mode="lr-tb"/>
    </style:style>
    <style:style style:name="gr42" style:family="graphic" style:parent-style-name="objectwithoutfill">
      <style:graphic-properties draw:marker-end="Стили_20_стрелок_20_7" draw:marker-end-width="0.3cm" draw:fill="none" draw:textarea-vertical-align="middle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2cee0e" fo:min-height="2.338cm" loext:decorative="false"/>
      <style:paragraph-properties style:writing-mode="lr-tb"/>
    </style:style>
    <style:style style:name="gr44" style:family="graphic" style:parent-style-name="Объект_20_без_20_заливки_20_и_20_линий_5f_3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7" style:family="graphic" style:parent-style-name="standard">
      <style:graphic-properties draw:stroke="none" draw:fill="solid" draw:fill-color="#ccf4c6" fo:min-height="2.35cm" loext:decorative="false"/>
      <style:paragraph-properties style:writing-mode="lr-tb"/>
    </style:style>
    <style:style style:name="gr48" style:family="graphic" style:parent-style-name="standard">
      <style:graphic-properties draw:stroke="none" draw:fill="solid" draw:fill-color="#aadcf7" fo:min-height="2.509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fde9a9" fo:min-height="6.15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51" style:family="graphic" style:parent-style-name="standard">
      <style:graphic-properties draw:stroke="none" draw:fill="solid" draw:fill-color="#ccf4c6" fo:min-height="3.15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53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6.381cm" loext:decorative="false"/>
      <style:paragraph-properties style:writing-mode="lr-tb"/>
    </style:style>
    <style:style style:name="gr55" style:family="graphic" style:parent-style-name="Обычный_5f_2_5f_2_5f_1" style:list-style-name="L2">
      <style:graphic-properties draw:stroke="none" draw:fill="none" fo:min-height="9.1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4.032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928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left" fo:text-indent="0cm"/>
    </style:style>
    <style:style style:name="P4" style:family="paragraph">
      <style:paragraph-properties fo:margin-left="0cm" fo:margin-right="0cm" fo:text-align="left" fo:text-indent="0cm"/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dbb6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solid" draw:fill-color="#fff5ce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ffdbb6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>
      <loext:graphic-properties draw:fill="solid" draw:fill-color="#ffb66c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2cee0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="solid" draw:fill-color="#ccf4c6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>
      <loext:graphic-properties draw:fill="solid" draw:fill-color="#aadcf7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>
      <style:paragraph-properties fo:text-align="right"/>
    </style:style>
    <style:style style:name="P31" style:family="paragraph">
      <loext:graphic-properties draw:fill="solid" draw:fill-color="#fde9a9"/>
      <style:paragraph-properties fo:text-align="center"/>
      <style:text-properties style:text-underline-style="none" fo:font-weight="normal" style:font-weight-asian="normal" style:font-weight-complex="normal"/>
    </style:style>
    <style:style style:name="P32" style:family="paragraph">
      <loext:graphic-properties draw:fill="solid" draw:fill-color="#fde9a9"/>
      <style:paragraph-properties fo:text-align="center"/>
    </style:style>
    <style:style style:name="P33" style:family="paragraph">
      <loext:graphic-properties draw:fill="solid" draw:fill-color="#ccf4c6"/>
      <style:paragraph-properties fo:text-align="center"/>
      <style:text-properties style:text-underline-style="none" fo:font-weight="normal" style:font-weight-asian="normal" style:font-weight-complex="normal"/>
    </style:style>
    <style:style style:name="P34" style:family="paragraph">
      <loext:graphic-properties draw:fill="none" draw:fill-color="#fde9a9"/>
      <style:paragraph-properties fo:text-align="center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21pt" fo:font-style="normal" fo:text-shadow="none" style:text-underline-style="solid" style:text-underline-width="auto" style:text-underline-color="font-color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c9211e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7" style:family="text">
      <style:text-properties style:font-name="Droid Sans Mono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38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7.999cm" svg:height="5.557cm" svg:x="4.6cm" svg:y="8.037cm" presentation:class="subtitle" presentation:user-transformed="true">
          <draw:text-box>
            <text:p><text:span text:style-name="T1">Задача частичного обучен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2" draw:layer="layout" svg:width="26cm" svg:height="12.318cm" svg:x="1cm" svg:y="4.882cm">
          <draw:text-box>
            <text:p><text:span text:style-name="T4">способы организации данных и типы задач ML <text:s/></text:span></text:p>
            <text:p><text:span text:style-name="T5"/></text:p>
            <text:p><text:span text:style-name="T6">supervised learning</text:span><text:span text:style-name="T7"> </text:span></text:p>
            <text:p><text:span text:style-name="T8">- размеченный датасет {</text:span><text:span text:style-name="T9">X,target}</text:span><text:span text:style-name="T8">, (регрессия, классификация)</text:span></text:p>
            <text:p><text:span text:style-name="T8"/></text:p>
            <text:p><text:span text:style-name="T10"/></text:p>
            <text:p><text:span text:style-name="T6">unsupervised learning</text:span><text:span text:style-name="T7"> </text:span></text:p>
            <text:p><text:span text:style-name="T8">- НЕразмеченный датасет </text:span><text:span text:style-name="T9">{X}</text:span><text:span text:style-name="T8"> (кластеризация)</text:span></text:p>
            <text:p><text:span text:style-name="T11"/></text:p>
            <text:p><text:span text:style-name="T12"/></text:p>
            <text:p><text:span text:style-name="T13">semi-supervised learning</text:span><text:span text:style-name="T14"> </text:span></text:p>
            <text:p><text:span text:style-name="T15">- частично размеченный датасет </text:span><text:span text:style-name="T16">{</text:span><text:span text:style-name="T17">X,target,X’}</text:span><text:span text:style-name="T16">, (трансдуктивные модели)</text:span></text:p>
            <text:p><text:span text:style-name="T16"/></text:p>
            <text:p><text:span text:style-name="T8"/></text:p>
          </draw:text-box>
        </draw:frame>
        <draw:frame presentation:style-name="pr3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3" draw:text-style-name="P7" draw:layer="layout" svg:width="26cm" svg:height="12.043cm" svg:x="1cm" svg:y="5.242cm">
          <draw:text-box>
            <text:p><text:span text:style-name="T1">Дано: </text:span><text:s/>множество объектов X, <text:s/>множество классов Y ; </text:p>
            <text:p/>
            <text:p text:style-name="P6"><text:span text:style-name="T11">из них только </text:span>ℓ размеченных</text:p>
            <text:p/>
            <text:p>Xℓ = <text:s/>{x1, . . . , xℓ } ; <text:s/>{ y1, . . . , yℓ } - размеченная выборка (labeled data); </text:p>
            <text:p text:style-name="P6"/>
            <text:p>Xk = <text:s/>{ xℓ+1, . . . , xℓ+k }— неразмеченная выборка (unlabeled data). </text:p>
            <text:p/>
            <text:p><text:span text:style-name="T19">Два варианта постановки задачи: </text:span></text:p>
            <text:p/>
            <text:list text:style-name="L2">
              <text:list-item>
                <text:p><text:span text:style-name="T1">Частичное обучение</text:span> (semi-supervised learning): </text:p>
                <text:p>построить алгоритм классификации a : X → Y . </text:p>
                <text:p/>
              </text:list-item>
              <text:list-item>
                <text:p><text:span text:style-name="T1">Трансдуктивное обучение</text:span> (transductive learning): </text:p>
                <text:p>доразметить данные,</text:p>
                <text:p>т. е. зная все <text:s/>{ xℓ+1, . . . , xℓ+k}, получить метки <text:s/>{ yℓ+1, . . . , yℓ+k }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4" draw:text-style-name="P7" draw:layer="layout" svg:width="20.387cm" svg:height="1.725cm" svg:x="4.2cm" svg:y="6.075cm">
          <draw:text-box>
            <text:p><text:span text:style-name="T1">Рассмотрим частично размеченный датасет</text:span></text:p>
          </draw:text-box>
        </draw:frame>
        <draw:frame draw:style-name="gr5" draw:text-style-name="P8" draw:layer="layout" svg:width="8.386cm" svg:height="7cm" svg:x="3cm" svg:y="8.8cm">
          <draw:image xlink:href="Pictures/100000010000014D00000116DD29174B.png" xlink:type="simple" xlink:show="embed" xlink:actuate="onLoad" draw:mime-type="image/png">
            <text:p/>
          </draw:image>
        </draw:frame>
        <draw:frame draw:style-name="gr5" draw:text-style-name="P8" draw:layer="layout" svg:width="8.704cm" svg:height="7.619cm" svg:x="16.096cm" svg:y="8.4cm">
          <draw:image xlink:href="Pictures/100000010000014900000120793AB7EA.png" xlink:type="simple" xlink:show="embed" xlink:actuate="onLoad" draw:mime-type="image/png">
            <text:p/>
          </draw:image>
        </draw:frame>
        <draw:frame presentation:style-name="pr5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6" draw:text-style-name="P7" draw:layer="layout" svg:width="25.787cm" svg:height="1cm" svg:x="1.013cm" svg:y="3.8cm">
          <draw:text-box>
            <text:p><text:span text:style-name="T1">SSL не сводится к классификации</text:span></text:p>
          </draw:text-box>
        </draw:frame>
        <draw:frame draw:style-name="gr5" draw:text-style-name="P8" draw:layer="layout" svg:width="8.386cm" svg:height="7cm" svg:x="2.214cm" svg:y="5.2cm">
          <draw:image xlink:href="Pictures/100000010000014D00000116DD29174B.png" xlink:type="simple" xlink:show="embed" xlink:actuate="onLoad" draw:mime-type="image/png">
            <text:p/>
          </draw:image>
        </draw:frame>
        <draw:frame draw:style-name="gr5" draw:text-style-name="P8" draw:layer="layout" svg:width="6.969cm" svg:height="6.087cm" svg:x="11.397cm" svg:y="13.313cm">
          <draw:image xlink:href="Pictures/10000001000001440000011B393A8271.png" xlink:type="simple" xlink:show="embed" xlink:actuate="onLoad" draw:mime-type="image/png">
            <text:p/>
          </draw:image>
        </draw:frame>
        <draw:frame draw:style-name="gr5" draw:text-style-name="P8" draw:layer="layout" svg:width="7.853cm" svg:height="6.951cm" svg:x="1.147cm" svg:y="12.849cm">
          <draw:image xlink:href="Pictures/100000010000014B00000125C4DD4C34.png" xlink:type="simple" xlink:show="embed" xlink:actuate="onLoad" draw:mime-type="image/png">
            <text:p/>
          </draw:image>
        </draw:frame>
        <draw:frame draw:style-name="gr5" draw:text-style-name="P8" draw:layer="layout" svg:width="8.704cm" svg:height="7.619cm" svg:x="13.2cm" svg:y="4.8cm">
          <draw:image xlink:href="Pictures/100000010000014900000120793AB7EA.png" xlink:type="simple" xlink:show="embed" xlink:actuate="onLoad" draw:mime-type="image/png">
            <text:p/>
          </draw:image>
        </draw:frame>
        <draw:frame draw:style-name="gr5" draw:text-style-name="P8" draw:layer="layout" svg:width="8.234cm" svg:height="6.686cm" svg:x="18.366cm" svg:y="12.914cm">
          <draw:image xlink:href="Pictures/10000001000001BF0000016B99B4308D.png" xlink:type="simple" xlink:show="embed" xlink:actuate="onLoad" draw:mime-type="image/png">
            <text:p/>
          </draw:image>
        </draw:frame>
        <draw:frame presentation:style-name="pr6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6" draw:text-style-name="P7" draw:layer="layout" svg:width="19.987cm" svg:height="1cm" svg:x="1.613cm" svg:y="5cm">
          <draw:text-box>
            <text:p><text:span text:style-name="T1">к кластеризации SSL тоже не сводится</text:span></text:p>
          </draw:text-box>
        </draw:frame>
        <draw:frame draw:style-name="gr5" draw:text-style-name="P8" draw:layer="layout" svg:width="11.191cm" svg:height="9.127cm" svg:x="7.2cm" svg:y="7.473cm">
          <draw:image xlink:href="Pictures/10000001000001A7000001596721F961.png" xlink:type="simple" xlink:show="embed" xlink:actuate="onLoad" draw:mime-type="image/png">
            <text:p/>
          </draw:image>
        </draw:frame>
        <draw:frame presentation:style-name="pr7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draw:style-name="gr7" draw:text-style-name="P9" draw:layer="layout" svg:width="23.2cm" svg:height="3.2cm" svg:x="0.8cm" svg:y="4cm">
          <draw:text-box>
            <text:p><text:span text:style-name="T20">метод кластеризации </text:span><text:span text:style-name="T21">КНП (Кратчайший Незамкнутый Путь)</text:span></text:p>
            <text:p><text:span text:style-name="T22"/></text:p>
            <text:p><text:span text:style-name="T23">параметр</text:span><text:span text:style-name="T22"> - количество кластеров k</text:span></text:p>
            <text:p><text:span text:style-name="T23">цель</text:span><text:span text:style-name="T22"> - построить ациклический граф на точках</text:span></text:p>
          </draw:text-box>
        </draw:frame>
        <draw:custom-shape draw:style-name="gr8" draw:text-style-name="P12" xml:id="id1" draw:id="id1" draw:layer="layout" svg:width="8cm" svg:height="3cm" svg:x="1cm" svg:y="10.2cm">
          <text:p text:style-name="P10"><text:span text:style-name="T24">найти пару точек </text:span></text:p>
          <text:p text:style-name="P10"><text:span text:style-name="T24">связанную и изолированную</text:span></text:p>
          <text:p text:style-name="P11"><text:span text:style-name="T24">с мин. расстоянием</text:span></text:p>
          <text:p text:style-name="P10"><text:span text:style-name="T24">соединить их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5" draw:id="id5" draw:layer="layout" svg:width="3cm" svg:height="1cm" svg:x="18.6cm" svg:y="6.6cm">
          <text:p text:style-name="P10"><text:span text:style-name="T24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" draw:id="id2" draw:layer="layout" svg:width="5.6cm" svg:height="3.2cm" svg:x="11cm" svg:y="10.8cm">
          <text:p text:style-name="P10"><text:span text:style-name="T24">есть еще </text:span></text:p>
          <text:p text:style-name="P10"><text:span text:style-name="T24">изолированные</text:span></text:p>
          <text:p text:style-name="P10"><text:span text:style-name="T24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line-skew="1.098cm" svg:x1="5cm" svg:y1="13.2cm" svg:x2="13.8cm" svg:y2="14cm" draw:start-shape="id1" draw:start-glue-point="2" draw:end-shape="id2" draw:end-glue-point="6" svg:d="M5000 13200v2400h8800v-1600" svg:viewBox="0 0 8801 2401">
          <text:p/>
        </draw:connector>
        <draw:connector draw:style-name="gr12" draw:text-style-name="P8" draw:layer="layout" svg:x1="11cm" svg:y1="12.4cm" svg:x2="9cm" svg:y2="11.7cm" draw:start-shape="id2" draw:start-glue-point="5" draw:end-shape="id1" draw:end-glue-point="1" svg:d="M11000 12400h-1000v-700h-1000" svg:viewBox="0 0 2001 701">
          <text:p text:style-name="P15"><text:s text:c="6"/>да</text:p>
        </draw:connector>
        <draw:connector draw:style-name="gr12" draw:text-style-name="P8" draw:layer="layout" svg:x1="13.8cm" svg:y1="10.8cm" svg:x2="13.8cm" svg:y2="9.8cm" draw:start-shape="id2" draw:start-glue-point="4" draw:end-shape="id3" draw:end-glue-point="2" svg:d="M13800 10800v-1000" svg:viewBox="0 0 1 1001">
          <text:p text:style-name="P15"><text:s text:c="9"/>нет</text:p>
        </draw:connector>
        <draw:custom-shape draw:style-name="gr13" draw:text-style-name="P16" xml:id="id4" draw:id="id4" draw:layer="layout" svg:width="6.8cm" svg:height="1.8cm" svg:x="1.6cm" svg:y="7.2cm">
          <text:p text:style-name="P11"><text:span text:style-name="T24">найти пару точек </text:span></text:p>
          <text:p text:style-name="P11"><text:span text:style-name="T24">с мин.расстоянием</text:span></text:p>
          <text:p text:style-name="P11"><text:span text:style-name="T24">соединить их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5cm" svg:y1="9cm" svg:x2="5cm" svg:y2="10.2cm" draw:start-shape="id4" draw:start-glue-point="2" draw:end-shape="id1" draw:end-glue-point="0" svg:d="M5000 9000v1200" svg:viewBox="0 0 1 1201">
          <text:p/>
        </draw:connector>
        <draw:custom-shape draw:style-name="gr14" draw:text-style-name="P12" xml:id="id3" draw:id="id3" draw:layer="layout" svg:width="8cm" svg:height="2.8cm" svg:x="9.8cm" svg:y="7cm">
          <text:p text:style-name="P10"><text:span text:style-name="T24">разрезать граф - удалить </text:span></text:p>
          <text:p text:style-name="P10"><text:span text:style-name="T24">k самых длинных рёбер,</text:span></text:p>
          <text:p text:style-name="P10"><text:span text:style-name="T24">обойти каждую часть графа</text:span></text:p>
          <text:p text:style-name="P10"><text:span text:style-name="T24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7.8cm" svg:y1="8.4cm" svg:x2="20.1cm" svg:y2="7.6cm" draw:start-shape="id3" draw:start-glue-point="1" draw:end-shape="id5" draw:end-glue-point="2" svg:d="M17800 8400h2300v-800" svg:viewBox="0 0 2301 801">
          <text:p/>
        </draw:connector>
        <draw:frame draw:style-name="gr5" draw:text-style-name="P8" draw:layer="layout" svg:width="10.272cm" svg:height="7cm" svg:x="16.728cm" svg:y="11.6cm">
          <draw:image xlink:href="Pictures/10000001000002060000016187DE5FB3.png" xlink:type="simple" xlink:show="embed" xlink:actuate="onLoad" draw:mime-type="image/png">
            <text:p/>
          </draw:image>
        </draw:frame>
        <draw:frame presentation:style-name="pr8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draw:style-name="gr7" draw:text-style-name="P9" draw:layer="layout" svg:width="23.2cm" svg:height="3.2cm" svg:x="0.8cm" svg:y="4cm">
          <draw:text-box>
            <text:p><text:span text:style-name="T20">метод T-</text:span><text:span text:style-name="T21">КНП (Трансдуктивный Кратчайший Незамкнутый Путь)</text:span></text:p>
            <text:p><text:span text:style-name="T22"/></text:p>
            <text:p><text:span text:style-name="T23">параметр</text:span><text:span text:style-name="T22"> - количество кластеров k</text:span></text:p>
            <text:p><text:span text:style-name="T23">цель</text:span><text:span text:style-name="T22"> - построить ациклический граф на точках</text:span></text:p>
          </draw:text-box>
        </draw:frame>
        <draw:custom-shape draw:style-name="gr8" draw:text-style-name="P12" xml:id="id6" draw:id="id6" draw:layer="layout" svg:width="8cm" svg:height="3cm" svg:x="1.4cm" svg:y="14cm">
          <text:p text:style-name="P10"><text:span text:style-name="T24">найти пару точек </text:span></text:p>
          <text:p text:style-name="P10"><text:span text:style-name="T24">связанную и изолированную</text:span></text:p>
          <text:p text:style-name="P11"><text:span text:style-name="T24">с мин. расстоянием</text:span></text:p>
          <text:p text:style-name="P10"><text:span text:style-name="T24">соединить их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0" draw:id="id10" draw:layer="layout" svg:width="3cm" svg:height="1cm" svg:x="4.8cm" svg:y="7.4cm">
          <text:p text:style-name="P10"><text:span text:style-name="T24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7" draw:id="id7" draw:layer="layout" svg:width="5.6cm" svg:height="3.2cm" svg:x="11cm" svg:y="14.8cm">
          <text:p text:style-name="P10"><text:span text:style-name="T24">есть еще </text:span></text:p>
          <text:p text:style-name="P10"><text:span text:style-name="T24">изолированные</text:span></text:p>
          <text:p text:style-name="P10"><text:span text:style-name="T24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line-skew="1.098cm" svg:x1="5.4cm" svg:y1="17cm" svg:x2="13.8cm" svg:y2="18cm" draw:start-shape="id6" draw:start-glue-point="2" draw:end-shape="id7" draw:end-glue-point="6" svg:d="M5400 17000v2600h8400v-1600" svg:viewBox="0 0 8401 2601">
          <text:p/>
        </draw:connector>
        <draw:connector draw:style-name="gr12" draw:text-style-name="P8" draw:layer="layout" svg:x1="11cm" svg:y1="16.4cm" svg:x2="9.4cm" svg:y2="15.5cm" draw:start-shape="id7" draw:start-glue-point="5" draw:end-shape="id6" draw:end-glue-point="1" svg:d="M11000 16400h-800v-900h-800" svg:viewBox="0 0 1601 901">
          <text:p text:style-name="P15"><text:s text:c="6"/>да</text:p>
        </draw:connector>
        <draw:connector draw:style-name="gr12" draw:text-style-name="P8" draw:layer="layout" svg:x1="13.8cm" svg:y1="14.8cm" svg:x2="13.8cm" svg:y2="13.6cm" draw:start-shape="id7" draw:start-glue-point="4" draw:end-shape="id8" draw:end-glue-point="2" svg:d="M13800 14800v-1200" svg:viewBox="0 0 1 1201">
          <text:p text:style-name="P15"><text:s text:c="7"/>нет</text:p>
        </draw:connector>
        <draw:custom-shape draw:style-name="gr16" draw:text-style-name="P16" xml:id="id9" draw:id="id9" draw:layer="layout" svg:width="6.8cm" svg:height="1.8cm" svg:x="2cm" svg:y="11cm">
          <text:p text:style-name="P11"><text:span text:style-name="T24">найти пару точек </text:span></text:p>
          <text:p text:style-name="P11"><text:span text:style-name="T24">с мин. расстоянием</text:span></text:p>
          <text:p text:style-name="P11"><text:span text:style-name="T24">соединить их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5.4cm" svg:y1="12.8cm" svg:x2="5.4cm" svg:y2="14cm" draw:start-shape="id9" draw:start-glue-point="2" draw:end-shape="id6" draw:end-glue-point="0" svg:d="M5400 12800v1200" svg:viewBox="0 0 1 1201">
          <text:p/>
        </draw:connector>
        <draw:custom-shape draw:style-name="gr17" draw:text-style-name="P18" xml:id="id8" draw:id="id8" draw:layer="layout" svg:width="8.8cm" svg:height="6.8cm" svg:x="9.4cm" svg:y="6.8cm">
          <text:p text:style-name="P10"><text:span text:style-name="T24">разрезать граф - удалить </text:span></text:p>
          <text:p text:style-name="P10"><text:span text:style-name="T24">k самых длинных рёбер,</text:span></text:p>
          <text:p text:style-name="P10"><text:span text:style-name="T24"/></text:p>
          <text:p text:style-name="P10"><text:span text:style-name="T25">если эти рёбра <text:s/></text:span></text:p>
          <text:p text:style-name="P10"><text:span text:style-name="T25">не соединяют подграфы </text:span></text:p>
          <text:p text:style-name="P10"><text:span text:style-name="T25">с точками из одного класса</text:span></text:p>
          <text:p text:style-name="P10"><text:span text:style-name="T24"/></text:p>
          <text:p text:style-name="P10"><text:span text:style-name="T24">обойти каждую часть графа</text:span></text:p>
          <text:p text:style-name="P10"><text:span text:style-name="T24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9.4cm" svg:y1="10.2cm" svg:x2="6.3cm" svg:y2="8.4cm" draw:start-shape="id8" draw:start-glue-point="3" draw:end-shape="id10" draw:end-glue-point="2" svg:d="M9400 10200h-3100v-1800" svg:viewBox="0 0 3101 1801">
          <text:p/>
        </draw:connector>
        <draw:frame draw:style-name="gr5" draw:text-style-name="P8" draw:layer="layout" svg:width="7.333cm" svg:height="6.419cm" svg:x="19.067cm" svg:y="5.2cm">
          <draw:image xlink:href="Pictures/100000010000014900000120793AB7EA.png" xlink:type="simple" xlink:show="embed" xlink:actuate="onLoad" draw:mime-type="image/png">
            <text:p/>
          </draw:image>
        </draw:frame>
        <draw:frame draw:style-name="gr18" draw:text-style-name="P8" draw:layer="layout" svg:width="8.163cm" svg:height="5.442cm" svg:x="18.6cm" svg:y="13.2cm">
          <draw:image xlink:href="Pictures/1000000100000288000001B06040B118.png" xlink:type="simple" xlink:show="embed" xlink:actuate="onLoad" draw:mime-type="image/png">
            <text:p/>
          </draw:image>
        </draw:frame>
        <draw:frame presentation:style-name="pr9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19" draw:text-style-name="P9" draw:layer="layout" svg:width="14.6cm" svg:height="2.707cm" svg:x="0.8cm" svg:y="3.8cm">
          <draw:text-box>
            <text:p><text:span text:style-name="T20">метод кластеризации </text:span><text:span text:style-name="T21">к-средних (k-means)</text:span></text:p>
            <text:p><text:span text:style-name="T21"/></text:p>
            <text:p><text:span text:style-name="T23">параметр</text:span><text:span text:style-name="T22"> - количество кластеров</text:span></text:p>
            <text:p><text:span text:style-name="T23">цель</text:span><text:span text:style-name="T22"> - найти точки-центроиды</text:span></text:p>
          </draw:text-box>
        </draw:frame>
        <draw:custom-shape draw:style-name="gr20" draw:text-style-name="P19" xml:id="id13" draw:id="id13" draw:layer="layout" svg:width="6cm" svg:height="1.6cm" svg:x="2cm" svg:y="6.8cm">
          <text:p text:style-name="P10"><text:span text:style-name="T24">инициализировать </text:span></text:p>
          <text:p text:style-name="P10"><text:span text:style-name="T24">цетроиды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1" draw:id="id11" draw:layer="layout" svg:width="6cm" svg:height="2cm" svg:x="2cm" svg:y="9.4cm">
          <text:p text:style-name="P10"><text:span text:style-name="T24">разобрать точки </text:span></text:p>
          <text:p text:style-name="P10"><text:span text:style-name="T24">по мере близости </text:span></text:p>
          <text:p text:style-name="P10"><text:span text:style-name="T24">к центроидам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2" draw:id="id12" draw:layer="layout" svg:width="8cm" svg:height="2cm" svg:x="1cm" svg:y="12.4cm">
          <text:p text:style-name="P10"><text:span text:style-name="T24">пересчитать центроиды</text:span></text:p>
          <text:p text:style-name="P10"><text:span text:style-name="T24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4" draw:id="id14" draw:layer="layout" svg:width="5cm" svg:height="3.2cm" svg:x="9.702cm" svg:y="8.8cm">
          <text:p text:style-name="P10"><text:span text:style-name="T24">центроиды </text:span></text:p>
          <text:p text:style-name="P10"><text:span text:style-name="T24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5cm" svg:y1="11.4cm" svg:x2="5cm" svg:y2="12.4cm" draw:start-shape="id11" draw:start-glue-point="2" draw:end-shape="id12" draw:end-glue-point="0" svg:d="M5000 11400v1000" svg:viewBox="0 0 1 1001">
          <text:p/>
        </draw:connector>
        <draw:connector draw:style-name="gr15" draw:text-style-name="P8" draw:layer="layout" svg:x1="5cm" svg:y1="8.4cm" svg:x2="5cm" svg:y2="9.4cm" draw:start-shape="id13" draw:start-glue-point="2" draw:end-shape="id11" draw:end-glue-point="0" svg:d="M5000 8400v1000" svg:viewBox="0 0 1 1001">
          <text:p/>
        </draw:connector>
        <draw:connector draw:style-name="gr24" draw:text-style-name="P8" draw:layer="layout" svg:x1="9.702cm" svg:y1="10.4cm" svg:x2="8cm" svg:y2="10.4cm" draw:start-shape="id14" draw:start-glue-point="5" draw:end-shape="id11" draw:end-glue-point="1" svg:d="M9702 10400h-1702" svg:viewBox="0 0 1703 1">
          <text:p text:style-name="P15"/>
          <text:p text:style-name="P15"><text:s text:c="3"/>да</text:p>
        </draw:connector>
        <draw:connector draw:style-name="gr15" draw:text-style-name="P8" draw:layer="layout" svg:x1="9cm" svg:y1="13.4cm" svg:x2="12.202cm" svg:y2="12cm" draw:start-shape="id12" draw:start-glue-point="1" draw:end-shape="id14" draw:end-glue-point="6" svg:d="M9000 13400h3202v-1400" svg:viewBox="0 0 3203 1401">
          <text:p/>
        </draw:connector>
        <draw:connector draw:style-name="gr24" draw:text-style-name="P8" draw:layer="layout" svg:x1="12.202cm" svg:y1="8.8cm" svg:x2="12.2cm" svg:y2="7.4cm" draw:start-shape="id14" draw:start-glue-point="4" draw:end-shape="id15" draw:end-glue-point="2" svg:d="M12202 8800v-700h-2v-700" svg:viewBox="0 0 3 1401">
          <text:p text:style-name="P15"><text:s text:c="9"/>нет</text:p>
        </draw:connector>
        <draw:custom-shape draw:style-name="gr25" draw:text-style-name="P13" xml:id="id15" draw:id="id15" draw:layer="layout" svg:width="3.2cm" svg:height="1cm" svg:x="10.6cm" svg:y="6.4cm">
          <text:p text:style-name="P10"><text:span text:style-name="T24">конец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6.6cm" svg:height="6.6cm" svg:x="16.4cm" svg:y="3.8cm">
          <draw:image xlink:href="Pictures/1000000100000168000001683FE70C36.png" xlink:type="simple" xlink:show="embed" xlink:actuate="onLoad" draw:mime-type="image/png">
            <text:p/>
          </draw:image>
        </draw:frame>
        <draw:frame draw:style-name="gr18" draw:text-style-name="P8" draw:layer="layout" svg:width="9.001cm" svg:height="9.001cm" svg:x="14.8cm" svg:y="10.799cm">
          <draw:image xlink:href="Pictures/10000001000001680000016805C71104.png" xlink:type="simple" xlink:show="embed" xlink:actuate="onLoad" draw:mime-type="image/png">
            <text:p/>
          </draw:image>
        </draw:frame>
        <draw:frame presentation:style-name="pr10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19" draw:text-style-name="P9" draw:layer="layout" svg:width="12.6cm" svg:height="2.707cm" svg:x="1cm" svg:y="4cm">
          <draw:text-box>
            <text:p><text:span text:style-name="T20">трансдуктивный метод </text:span><text:span text:style-name="T21">k-means</text:span></text:p>
            <text:p><text:span text:style-name="T21"/></text:p>
            <text:p><text:span text:style-name="T23">параметр</text:span><text:span text:style-name="T22"> - количество кластеров</text:span></text:p>
            <text:p><text:span text:style-name="T23">цель</text:span><text:span text:style-name="T22"> - найти точки-центроиды</text:span></text:p>
          </draw:text-box>
        </draw:frame>
        <draw:custom-shape draw:style-name="gr26" draw:text-style-name="P18" xml:id="id18" draw:id="id18" draw:layer="layout" svg:width="10cm" svg:height="1.6cm" svg:x="1.8cm" svg:y="9.4cm">
          <text:p text:style-name="P10"><text:span text:style-name="T25">размеченные</text:span><text:span text:style-name="T24"> </text:span><text:span text:style-name="T25">точки «жестко»</text:span></text:p>
          <text:p text:style-name="P11"><text:span text:style-name="T26">привязать к своим </text:span><text:span text:style-name="T25">центроидам 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xml:id="id16" draw:id="id16" draw:layer="layout" svg:width="10.4cm" svg:height="2.4cm" svg:x="1.6cm" svg:y="12.4cm">
          <text:p text:style-name="P10"><text:span text:style-name="T24">разобрать </text:span><text:span text:style-name="T25">неразмеченные</text:span><text:span text:style-name="T24"> точки </text:span></text:p>
          <text:p text:style-name="P10"><text:span text:style-name="T24">по мере близости к центроидам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7" draw:id="id17" draw:layer="layout" svg:width="8cm" svg:height="2cm" svg:x="2.8cm" svg:y="16.4cm">
          <text:p text:style-name="P10"><text:span text:style-name="T24">пересчитать центроиды</text:span></text:p>
          <text:p text:style-name="P10"><text:span text:style-name="T24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9" draw:id="id19" draw:layer="layout" svg:width="5cm" svg:height="3.2cm" svg:x="14cm" svg:y="12cm">
          <text:p text:style-name="P10"><text:span text:style-name="T24">центроиды </text:span></text:p>
          <text:p text:style-name="P10"><text:span text:style-name="T24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6.8cm" svg:y1="14.8cm" svg:x2="6.8cm" svg:y2="16.4cm" draw:start-shape="id16" draw:start-glue-point="2" draw:end-shape="id17" draw:end-glue-point="0" svg:d="M6800 14800v1600" svg:viewBox="0 0 1 1601">
          <text:p/>
        </draw:connector>
        <draw:connector draw:style-name="gr15" draw:text-style-name="P8" draw:layer="layout" svg:x1="6.8cm" svg:y1="11cm" svg:x2="6.8cm" svg:y2="12.4cm" draw:start-shape="id18" draw:start-glue-point="2" draw:end-shape="id16" draw:end-glue-point="0" svg:d="M6800 11000v1400" svg:viewBox="0 0 1 1401">
          <text:p/>
        </draw:connector>
        <draw:connector draw:style-name="gr24" draw:text-style-name="P8" draw:layer="layout" svg:x1="14cm" svg:y1="13.6cm" svg:x2="12cm" svg:y2="13.6cm" draw:start-shape="id19" draw:start-glue-point="5" draw:end-shape="id16" draw:end-glue-point="1" svg:d="M14000 13600h-2000" svg:viewBox="0 0 2001 1">
          <text:p text:style-name="P15"/>
          <text:p text:style-name="P15"><text:s text:c="7"/>да</text:p>
        </draw:connector>
        <draw:connector draw:style-name="gr15" draw:text-style-name="P8" draw:layer="layout" svg:x1="10.8cm" svg:y1="17.4cm" svg:x2="16.5cm" svg:y2="15.2cm" draw:start-shape="id17" draw:start-glue-point="1" draw:end-shape="id19" draw:end-glue-point="6" svg:d="M10800 17400h5700v-2200" svg:viewBox="0 0 5701 2201">
          <text:p/>
        </draw:connector>
        <draw:connector draw:style-name="gr24" draw:text-style-name="P8" draw:layer="layout" svg:x1="16.5cm" svg:y1="12cm" svg:x2="15.2cm" svg:y2="9.6cm" draw:start-shape="id19" draw:start-glue-point="4" draw:end-shape="id20" draw:end-glue-point="2" svg:d="M16500 12000v-1200h-1300v-1200" svg:viewBox="0 0 1301 2401">
          <text:p text:style-name="P15"><text:s text:c="13"/>нет</text:p>
        </draw:connector>
        <draw:custom-shape draw:style-name="gr25" draw:text-style-name="P13" xml:id="id20" draw:id="id20" draw:layer="layout" svg:width="3.2cm" svg:height="1cm" svg:x="13.6cm" svg:y="8.6cm">
          <text:p text:style-name="P10"><text:span text:style-name="T24">конец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xml:id="id21" draw:id="id21" draw:layer="layout" svg:width="6cm" svg:height="1.6cm" svg:x="3.8cm" svg:y="7cm">
          <text:p text:style-name="P10"><text:span text:style-name="T24">инициализировать </text:span></text:p>
          <text:p text:style-name="P10"><text:span text:style-name="T24">цетроиды</text:span></text:p>
          <draw:enhanced-geometry svg:viewBox="0 0 21600 21600" draw:type="rectangle" draw:enhanced-path="M 0 0 L 21600 0 21600 21600 0 21600 0 0 Z N"/>
        </draw:custom-shape>
        <draw:connector draw:style-name="gr28" draw:text-style-name="P8" draw:layer="layout" draw:type="line" svg:x1="6.8cm" svg:y1="8.6cm" svg:x2="6.8cm" svg:y2="9.4cm" draw:start-shape="id21" draw:start-glue-point="2" draw:end-shape="id18" draw:end-glue-point="0" svg:d="M6800 8600v800" svg:viewBox="0 0 1 801">
          <text:p/>
        </draw:connector>
        <draw:frame presentation:style-name="pr11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</text:span><text:span text:style-name="T18">частичног</text:span><text:span text:style-name="T18">о </text:span><text:span text:style-name="T18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draw:style-name="gr29" draw:text-style-name="P9" draw:layer="layout" svg:width="20cm" svg:height="2.2cm" svg:x="3.6cm" svg:y="9.4cm">
          <draw:text-box>
            <text:p><text:span text:style-name="T21">недостаток </text:span><text:span text:style-name="T21">трансдуктивных </text:span><text:span text:style-name="T21">методов кластеризации </text:span></text:p>
            <text:p><text:span text:style-name="T22"/></text:p>
            <text:p><text:span text:style-name="T22">- это медленно, </text:span><text:span text:style-name="T22">проблематично исполнять </text:span><text:span text:style-name="T22">для больших датасетов</text:span></text:p>
          </draw:text-box>
        </draw:frame>
        <draw:frame presentation:style-name="pr12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</text:span><text:span text:style-name="T18">частичного </text:span><text:span text:style-name="T18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draw:style-name="gr30" draw:text-style-name="P9" draw:layer="layout" svg:width="17.6cm" svg:height="0.865cm" svg:x="1.2cm" svg:y="4.098cm">
          <draw:text-box>
            <text:p><text:span text:style-name="T21">Классификация частично размеченного датасета</text:span></text:p>
          </draw:text-box>
        </draw:frame>
        <draw:frame draw:style-name="gr5" draw:text-style-name="P8" draw:layer="layout" svg:width="19.389cm" svg:height="6.2cm" svg:x="1.418cm" svg:y="5.4cm">
          <draw:image xlink:href="Pictures/1000000100000239000000B62B98E63B.png" xlink:type="simple" xlink:show="embed" xlink:actuate="onLoad" draw:mime-type="image/png">
            <text:p/>
          </draw:image>
        </draw:frame>
        <draw:frame draw:style-name="gr30" draw:text-style-name="P21" draw:layer="layout" svg:width="21cm" svg:height="0.865cm" svg:x="3.4cm" svg:y="12.13cm">
          <draw:text-box>
            <text:p><text:span text:style-name="T27">Как обучить классификатор на частично размеченном датасете?</text:span></text:p>
          </draw:text-box>
        </draw:frame>
        <draw:frame presentation:style-name="pr13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</text:span><text:span text:style-name="T18">частичного </text:span><text:span text:style-name="T18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draw:style-name="gr31" draw:text-style-name="P9" draw:layer="layout" svg:width="17.6cm" svg:height="1.479cm" svg:x="1.2cm" svg:y="4.098cm">
          <draw:text-box>
            <text:p><text:span text:style-name="T21">Алгоритм Self-Training — обёртка (wrapper) над произвольным методом обучения классификатора</text:span></text:p>
          </draw:text-box>
        </draw:frame>
        <draw:custom-shape draw:style-name="gr32" draw:text-style-name="P19" xml:id="id22" draw:id="id22" draw:layer="layout" svg:width="9.8cm" svg:height="1.6cm" svg:x="3cm" svg:y="9cm">
          <text:p text:style-name="P10"><text:span text:style-name="T24">поместить все размеченные </text:span></text:p>
          <text:p text:style-name="P10"><text:span text:style-name="T24">в буфер Z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23" draw:id="id23" draw:layer="layout" svg:width="9.8cm" svg:height="1.6cm" svg:x="3cm" svg:y="11.4cm">
          <text:p text:style-name="P22"><text:span text:style-name="T28">обучить классификатор <text:s/>a(b(x)) <text:s/></text:span></text:p>
          <text:p text:style-name="P22"><text:span text:style-name="T28">на </text:span><text:span text:style-name="T29">размеченных</text:span><text:span text:style-name="T28"> данных <text:s/>𝑍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24" draw:id="id24" draw:layer="layout" svg:width="12.2cm" svg:height="1.6cm" svg:x="1.8cm" svg:y="13.8cm">
          <text:p text:style-name="P10"><text:span text:style-name="T24">Оценить M(x|b) все </text:span><text:span text:style-name="T25">неразмеченные</text:span><text:span text:style-name="T24"> </text:span></text:p>
          <text:p text:style-name="P10"><text:span text:style-name="T24">и отобрать «надёжные» с высокой оценкой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xml:id="id25" draw:id="id25" draw:layer="layout" svg:width="11cm" svg:height="1.6cm" svg:x="2.4cm" svg:y="16.8cm">
          <text:p text:style-name="P10"><text:span text:style-name="T24">Доразметить отобранные «надёжные»</text:span></text:p>
          <text:p text:style-name="P11"><text:span text:style-name="T30">с помощью классификатора </text:span><text:span text:style-name="T28">𝑎 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26" draw:id="id26" draw:layer="layout" svg:width="9cm" svg:height="2.8cm" svg:x="14cm" svg:y="13cm">
          <text:p text:style-name="P10"><text:span text:style-name="T24">есть ещё</text:span></text:p>
          <text:p text:style-name="P11"><text:span text:style-name="T25">неразмеченные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8" draw:layer="layout" draw:type="line" svg:x1="7.9cm" svg:y1="10.6cm" svg:x2="7.9cm" svg:y2="11.4cm" draw:start-shape="id22" draw:start-glue-point="2" draw:end-shape="id23" draw:end-glue-point="0" svg:d="M7900 10600v800" svg:viewBox="0 0 1 801">
          <text:p/>
        </draw:connector>
        <draw:connector draw:style-name="gr38" draw:text-style-name="P8" draw:layer="layout" draw:type="line" svg:x1="7.9cm" svg:y1="13cm" svg:x2="7.9cm" svg:y2="13.8cm" draw:start-shape="id23" draw:start-glue-point="2" draw:end-shape="id24" draw:end-glue-point="0" svg:d="M7900 13000v800" svg:viewBox="0 0 1 801">
          <text:p/>
        </draw:connector>
        <draw:connector draw:style-name="gr39" draw:text-style-name="P8" draw:layer="layout" draw:type="line" svg:x1="7.9cm" svg:y1="15.4cm" svg:x2="7.9cm" svg:y2="16.8cm" draw:start-shape="id24" draw:start-glue-point="2" draw:end-shape="id25" draw:end-glue-point="0" svg:d="M7900 15400v1400" svg:viewBox="0 0 1 1401">
          <text:p/>
        </draw:connector>
        <draw:connector draw:style-name="gr40" draw:text-style-name="P8" draw:layer="layout" svg:x1="13.4cm" svg:y1="17.6cm" svg:x2="18.5cm" svg:y2="15.8cm" draw:start-shape="id25" draw:start-glue-point="1" draw:end-shape="id26" draw:end-glue-point="6" svg:d="M13400 17600h5100v-1800" svg:viewBox="0 0 5101 1801">
          <text:p/>
        </draw:connector>
        <draw:connector draw:style-name="gr41" draw:text-style-name="P8" draw:layer="layout" svg:x1="18.5cm" svg:y1="13cm" svg:x2="12.8cm" svg:y2="9.8cm" draw:start-shape="id26" draw:start-glue-point="4" draw:end-shape="id22" draw:end-glue-point="1" svg:d="M18500 13000v-3200h-5700" svg:viewBox="0 0 5701 3201">
          <text:p text:style-name="P15">да</text:p>
        </draw:connector>
        <draw:custom-shape draw:style-name="gr25" draw:text-style-name="P13" xml:id="id27" draw:id="id27" draw:layer="layout" svg:width="3.2cm" svg:height="1cm" svg:x="23.2cm" svg:y="10.6cm">
          <text:p text:style-name="P10"><text:span text:style-name="T24">конец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23cm" svg:y1="14.4cm" svg:x2="24.8cm" svg:y2="11.6cm" draw:start-shape="id26" draw:start-glue-point="7" draw:end-shape="id27" svg:d="M23000 14400h1800v-2800" svg:viewBox="0 0 1801 2801">
          <text:p text:style-name="P15">нет</text:p>
        </draw:connector>
        <draw:frame draw:style-name="gr5" draw:text-style-name="P8" draw:layer="layout" svg:width="16.509cm" svg:height="2.936cm" svg:x="7cm" svg:y="5.664cm">
          <draw:image xlink:href="Pictures/10000001000002700000006F6D7FD7E2.png" xlink:type="simple" xlink:show="embed" xlink:actuate="onLoad" draw:mime-type="image/png">
            <text:p/>
          </draw:image>
        </draw:frame>
        <draw:frame presentation:style-name="pr14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draw:style-name="gr43" draw:text-style-name="P25" draw:layer="layout" svg:width="10cm" svg:height="2.588cm" svg:x="17cm" svg:y="6.812cm">
          <draw:text-box>
            <text:p text:style-name="P15"><text:span text:style-name="T10">модель классификатора</text:span></text:p>
          </draw:text-box>
        </draw:frame>
        <draw:frame draw:style-name="gr44" draw:text-style-name="P8" draw:layer="layout" svg:width="10.383cm" svg:height="8.956cm" svg:x="1.217cm" svg:y="6.562cm">
          <draw:image xlink:href="Pictures/100000000000024D000001FC677A34A3.png" xlink:type="simple" xlink:show="embed" xlink:actuate="onLoad" draw:mime-type="image/png">
            <text:p/>
          </draw:image>
        </draw:frame>
        <draw:frame draw:style-name="gr45" draw:text-style-name="P27" draw:layer="layout" svg:width="9.2cm" svg:height="0.663cm" svg:x="0.6cm" svg:y="19.537cm">
          <draw:text-box>
            <text:p text:style-name="P26"><text:span text:style-name="T31"><text:a xlink:href="https://habr.com/ru/company/ods/blog/484148/" xlink:type="simple">https://habr.com/ru/company/ods/blog/484148/</text:a></text:span></text:p>
          </draw:text-box>
        </draw:frame>
        <draw:frame draw:style-name="gr46" draw:text-style-name="P15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28" draw:layer="layout" svg:width="7.4cm" svg:height="2.6cm" svg:x="16.4cm" svg:y="4cm">
          <draw:text-box>
            <text:p text:style-name="P15"><text:span text:style-name="T10">метки классов</text:span></text:p>
          </draw:text-box>
        </draw:frame>
        <draw:frame draw:style-name="gr48" draw:text-style-name="P29" draw:layer="layout" svg:width="8cm" svg:height="2.759cm" svg:x="16.6cm" svg:y="9.441cm">
          <draw:text-box>
            <text:p text:style-name="P15"><text:span text:style-name="T10">отступ (margine)</text:span></text:p>
          </draw:text-box>
        </draw:frame>
        <draw:frame draw:style-name="gr49" draw:text-style-name="P31" draw:layer="layout" svg:width="11.4cm" svg:height="6.4cm" svg:x="15.6cm" svg:y="12.8cm">
          <draw:text-box>
            <text:p text:style-name="P15"><text:span text:style-name="T10">разделяющая гиперплоскость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  <text:p text:style-name="P30"><text:span text:style-name="T32">позитивные </text:span></text:p>
            <text:p text:style-name="P30"><text:span text:style-name="T32"/></text:p>
            <text:p text:style-name="P30"><text:span text:style-name="T32">негативные </text:span></text:p>
          </draw:text-box>
        </draw:frame>
        <draw:frame draw:style-name="gr46" draw:text-style-name="P15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6" draw:text-style-name="P15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0" draw:text-style-name="P32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0" draw:text-style-name="P32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0" draw:text-style-name="P32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1" draw:text-style-name="P33" draw:layer="layout" svg:width="9.2cm" svg:height="3.4cm" svg:x="1cm" svg:y="16cm">
          <draw:text-box>
            <text:p text:style-name="P15"><text:span text:style-name="T33"><text:s/>ширина полосы</text:span></text:p>
          </draw:text-box>
        </draw:frame>
        <draw:frame draw:style-name="gr52" draw:text-style-name="P34" draw:layer="layout" svg:width="7.533cm" svg:height="1.938cm" svg:x="1.6cm" svg:y="17.0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3" draw:text-style-name="P7" draw:layer="layout" svg:width="15.4cm" svg:height="1.991cm" svg:x="0.8cm" svg:y="4.209cm">
          <draw:text-box>
            <text:p><text:span text:style-name="T34">Классификатор SVM</text:span></text:p>
            <text:p><text:span text:style-name="T35"/></text:p>
            <text:p><text:span text:style-name="T35">цель</text:span><text:span text:style-name="T36"> - разделительная </text:span><text:span text:style-name="T28">полоса максимальной ширины</text:span></text:p>
          </draw:text-box>
        </draw:frame>
        <draw:frame presentation:style-name="pr15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draw:style-name="gr45" draw:text-style-name="P27" draw:layer="layout" svg:width="9.2cm" svg:height="0.663cm" svg:x="0.6cm" svg:y="19.537cm">
          <draw:text-box>
            <text:p text:style-name="P26"><text:span text:style-name="T31"><text:a xlink:href="https://habr.com/ru/company/ods/blog/484148/" xlink:type="simple">https://habr.com/ru/company/ods/blog/484148/</text:a></text:span></text:p>
          </draw:text-box>
        </draw:frame>
        <draw:frame draw:style-name="gr54" draw:text-style-name="P7" draw:layer="layout" svg:width="26.2cm" svg:height="6.631cm" svg:x="0.8cm" svg:y="4.209cm">
          <draw:text-box>
            <text:p><text:span text:style-name="T34">T-SVM (Трансдуктивный SVM)</text:span></text:p>
            <text:p><text:span text:style-name="T35"/></text:p>
            <text:p><text:span text:style-name="T35">цель</text:span><text:span text:style-name="T36"> - разделительная </text:span><text:span text:style-name="T28">полоса максимальной ширины</text:span></text:p>
            <text:p><text:span text:style-name="T28"/></text:p>
            <text:p text:style-name="P6"><text:span text:style-name="T28">строим разделяющую полосу с двумя условиями</text:span></text:p>
            <text:p text:style-name="P6"><text:span text:style-name="T28">1. полоса максимальной ширины ограничивается размеченными объектами</text:span></text:p>
            <text:p text:style-name="P6"><text:span text:style-name="T28">2. минимизировать количество (неразмеченных) объектов попадающих на полосу</text:span></text:p>
            <text:p text:style-name="P6"><text:span text:style-name="T28"/></text:p>
            <text:p text:style-name="P6"><text:span text:style-name="T28">Функция потерь L(M) = (1−|M|)+ <text:s/></text:span></text:p>
            <text:p text:style-name="P6"><text:span text:style-name="T30">штрафует за попадание </text:span><text:span text:style-name="T28">неразмеченных объектов внутрь разделяющей полосы.</text:span></text:p>
            <text:p text:style-name="P6"><text:span text:style-name="T30">где </text:span><text:span text:style-name="T28">|M| - абсолютное значение отступа (модуль)</text:span></text:p>
          </draw:text-box>
        </draw:frame>
        <draw:frame draw:style-name="gr5" draw:text-style-name="P8" draw:layer="layout" svg:width="11.093cm" svg:height="7.411cm" svg:x="1.2cm" svg:y="11.589cm">
          <draw:image xlink:href="Pictures/10000001000002AF000001CB902ECDA2.png" xlink:type="simple" xlink:show="embed" xlink:actuate="onLoad" draw:mime-type="image/png">
            <text:p/>
          </draw:image>
        </draw:frame>
        <draw:frame draw:style-name="gr53" draw:text-style-name="P7" draw:layer="layout" svg:width="13.6cm" svg:height="1.991cm" svg:x="12.8cm" svg:y="16.409cm">
          <draw:text-box>
            <text:p><text:span text:style-name="T28">Пунктирная линия — решение обычного SVM</text:span></text:p>
            <text:p><text:span text:style-name="T28"/></text:p>
            <text:p text:style-name="P6"><text:span text:style-name="T28">Сплошная линия — решение T-SVM</text:span></text:p>
          </draw:text-box>
        </draw:frame>
        <draw:frame draw:style-name="gr5" draw:text-style-name="P8" draw:layer="layout" svg:width="14.525cm" svg:height="4.314cm" svg:x="12.675cm" svg:y="11.086cm">
          <draw:image xlink:href="Pictures/1000000100000357000000FEBADCB8FD.png" xlink:type="simple" xlink:show="embed" xlink:actuate="onLoad" draw:mime-type="image/png">
            <text:p/>
          </draw:image>
        </draw:frame>
        <draw:frame presentation:style-name="pr16" draw:text-style-name="P4" draw:layer="layout" svg:width="23.6cm" svg:height="1.928cm" svg:x="1.2cm" svg:y="1.67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draw:style-name="gr55" draw:text-style-name="P35" draw:layer="layout" svg:width="25.6cm" svg:height="9.4cm" svg:x="1cm" svg:y="4.2cm">
          <draw:text-box>
            <text:p text:style-name="P6"><text:span text:style-name="T37">Борисов Е.С. Методы машинного обучения. 2024</text:span></text:p>
            <text:p text:style-name="P6"><text:span text:style-name="T38"><text:a xlink:href="https://github.com/mechanoid5/ml_lectorium_2024_I" xlink:type="simple">https://github.com/mechanoid5/ml_lectorium_2024_I</text:a></text:span></text:p>
            <text:p><text:span text:style-name="T39"/></text:p>
            <text:p text:style-name="P6"><text:span text:style-name="T40"/></text:p>
            <text:p text:style-name="P6"><text:span text:style-name="T40">К.В. Воронцов <text:s/>Методы частичного обучения.</text:span></text:p>
            <text:p text:style-name="P6"><text:span text:style-name="T40"><text:a xlink:href="https://www.youtube.com/watch?v=DwA91VHydXU" xlink:type="simple">https://www.youtube.com/watch?v=DwA91VHydXU</text:a></text:span></text:p>
            <text:p text:style-name="P6"><text:span text:style-name="T40"><text:a xlink:href="http://www.machinelearning.ru/wiki/images/archive/9/9f/20151223000522%21Voron-ML-SSL.pdf" xlink:type="simple">http://www.machinelearning.ru/wiki/images/archive/9/9f/20151223000522%21Voron-ML-SSL.pdf</text:a></text:span></text:p>
            <text:p text:style-name="P6"><text:span text:style-name="T40"/></text:p>
            <text:p text:style-name="P6"><text:span text:style-name="T40"/></text:p>
            <text:p text:style-name="P6"><text:span text:style-name="T40">К.В.Воронцов Машинное обучение. курс лекций.</text:span></text:p>
            <text:p text:style-name="P6"><text:span text:style-name="T40"><text:a xlink:href="http://www.machinelearning.ru/wiki/index.php?title=Машинное_обучение_%28курс_лекций%2C_К.В.Воронцов%29" xlink:type="simple">http://www.machinelearning.ru/wiki/index.php?title=Машинное_обучение_%28курс_лекций%2C_К.В.Воронцов%29</text:a></text:span></text:p>
            <text:p text:style-name="P6"><text:span text:style-name="T40"/></text:p>
            <text:p text:style-name="P6"><text:span text:style-name="T40"/></text:p>
          </draw:text-box>
        </draw:frame>
        <draw:frame presentation:style-name="pr17" draw:text-style-name="P4" draw:layer="layout" svg:width="18cm" svg:height="1.398cm" svg:x="1.2cm" svg:y="1.832cm" presentation:class="title" presentation:user-transformed="true">
          <draw:text-box>
            <text:p text:style-name="P3"><text:span text:style-name="T18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5-16T10:20:01.975870036</dc:date>
    <meta:editing-duration>P2DT3H42M26S</meta:editing-duration>
    <meta:editing-cycles>638</meta:editing-cycles>
    <meta:generator>LibreOffice/26.2.2.2$Linux_X86_64 LibreOffice_project/620$Build-2</meta:generator>
    <meta:print-date>2026-05-16T10:13:06.390220149</meta:print-date>
    <meta:printed-by>Файлы PDF</meta:printed-by>
    <meta:document-statistic meta:object-count="18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= frac{2}{ldline w rdline} </annotation>
  </semantics>
</math>
</file>